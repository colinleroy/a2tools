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6000B4250EE.jpg" manifest:media-type="image/jpeg"/>
  <manifest:file-entry manifest:full-path="Pictures/100000010000029F000002054EBD5246.png" manifest:media-type="image/png"/>
  <manifest:file-entry manifest:full-path="Pictures/1000000000000800000006003E94DAFC.jpg" manifest:media-type="image/jpeg"/>
  <manifest:file-entry manifest:full-path="Pictures/100000000000080000000600D87270E6.jpg" manifest:media-type="image/jpeg"/>
  <manifest:file-entry manifest:full-path="Pictures/1000000000000800000006009B4CC2B8.jpg" manifest:media-type="image/jpeg"/>
  <manifest:file-entry manifest:full-path="Pictures/10000000000008000000060092DA14E0.jpg" manifest:media-type="image/jpeg"/>
  <manifest:file-entry manifest:full-path="Pictures/100000000000080000000600B41E41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2479in" style:rel-column-width="31792*"/>
    </style:style>
    <style:style style:name="Table1.B" style:family="table-column">
      <style:table-column-properties style:column-width="3.4472in" style:rel-column-width="3374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rsid="0187a2f6" officeooo:paragraph-rsid="0187a2f6"/>
    </style:style>
    <style:style style:name="P4" style:family="paragraph" style:parent-style-name="Preformatted_20_Text">
      <style:text-properties officeooo:paragraph-rsid="0187a2f6"/>
    </style:style>
    <style:style style:name="P5" style:family="paragraph" style:parent-style-name="Preformatted_20_Text">
      <style:text-properties officeooo:paragraph-rsid="018a24de"/>
    </style:style>
    <style:style style:name="P6" style:family="paragraph" style:parent-style-name="Table_20_Contents">
      <style:text-properties officeooo:rsid="0186193c" officeooo:paragraph-rsid="0186193c"/>
    </style:style>
    <style:style style:name="P7" style:family="paragraph" style:parent-style-name="Text_20_body">
      <style:text-properties fo:font-weight="normal" officeooo:rsid="017ff455" officeooo:paragraph-rsid="0186193c" style:font-weight-asian="normal" style:font-weight-complex="normal"/>
    </style:style>
    <style:style style:name="P8" style:family="paragraph" style:parent-style-name="Text_20_body">
      <style:text-properties officeooo:rsid="01880e6d" officeooo:paragraph-rsid="01880e6d"/>
    </style:style>
    <style:style style:name="P9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break-before="page"/>
      <style:text-properties officeooo:rsid="0187a2f6" officeooo:paragraph-rsid="0187a2f6"/>
    </style:style>
    <style:style style:name="P12" style:family="paragraph" style:parent-style-name="Heading_20_2">
      <style:paragraph-properties fo:break-before="page"/>
      <style:text-properties officeooo:rsid="01863516" officeooo:paragraph-rsid="018bc19d"/>
    </style:style>
    <style:style style:name="P13" style:family="paragraph" style:parent-style-name="Text_20_body">
      <style:text-properties officeooo:rsid="01880e6d" officeooo:paragraph-rsid="01880e6d"/>
    </style:style>
    <style:style style:name="P14" style:family="paragraph" style:parent-style-name="Text_20_body" style:list-style-name="L1">
      <style:text-properties officeooo:rsid="01863516" officeooo:paragraph-rsid="018bc19d"/>
    </style:style>
    <style:style style:name="P15" style:family="paragraph" style:parent-style-name="Text_20_body">
      <style:text-properties officeooo:rsid="01863516" officeooo:paragraph-rsid="018bc19d"/>
    </style:style>
    <style:style style:name="P16" style:family="paragraph" style:parent-style-name="Text_20_body" style:list-style-name="L1">
      <style:text-properties officeooo:paragraph-rsid="018bc19d"/>
    </style:style>
    <style:style style:name="T1" style:family="text">
      <style:text-properties officeooo:rsid="0187a2f6"/>
    </style:style>
    <style:style style:name="T2" style:family="text">
      <style:text-properties officeooo:rsid="018942ac"/>
    </style:style>
    <style:style style:name="T3" style:family="text">
      <style:text-properties officeooo:rsid="018a24de"/>
    </style:style>
    <style:style style:name="T4" style:family="text">
      <style:text-properties officeooo:rsid="018770e9"/>
    </style:style>
    <style:style style:name="T5" style:family="text">
      <style:text-properties officeooo:rsid="018bc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url-server Raspberry Pi 4/5 serial hat for Apple II</text:p>
      <text:p text:style-name="P2"/>
      <text:p text:style-name="P10">Quickstart</text:p>
      <text:h text:style-name="Heading_20_2" text:outline-level="2">Kit assembly is done in a few step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3" draw:name="Image1" text:anchor-type="char" svg:width="3.1846in" svg:height="2.3882in" draw:z-index="5"><draw:image xlink:href="Pictures/100000000000080000000600B41E4114.jpg" xlink:type="simple" xlink:show="embed" xlink:actuate="onLoad" draw:mime-type="image/jpeg"/></draw:frame>1. Insert four screws at the bottom of the case</text:p>
          </table:table-cell>
          <table:table-cell table:style-name="Table1.A1" office:value-type="string">
            <text:p text:style-name="P6"><draw:frame draw:style-name="fr1" draw:name="Image2" text:anchor-type="char" svg:x="0.0138in" svg:y="0in" svg:width="3.1791in" svg:height="2.3839in" draw:z-index="4"><draw:image xlink:href="Pictures/10000000000008000000060092DA14E0.jpg" xlink:type="simple" xlink:show="embed" xlink:actuate="onLoad" draw:mime-type="image/jpeg"/></draw:frame>2. Position the Pi in the case</text:p>
          </table:table-cell>
        </table:table-row>
        <table:table-row>
          <table:table-cell table:style-name="Table1.A1" office:value-type="string">
            <text:p text:style-name="P6"><draw:frame draw:style-name="fr2" draw:name="Image3" text:anchor-type="char" svg:width="3.1862in" svg:height="2.3898in" draw:z-index="3"><draw:image xlink:href="Pictures/100000000000080000000600D87270E6.jpg" xlink:type="simple" xlink:show="embed" xlink:actuate="onLoad" draw:mime-type="image/jpeg"/></draw:frame>3. Insert spacers on the screws</text:p>
          </table:table-cell>
          <table:table-cell table:style-name="Table1.A1" office:value-type="string">
            <text:p text:style-name="P6"><draw:frame draw:style-name="fr1" draw:name="Image4" text:anchor-type="char" svg:x="0.0063in" svg:y="0in" svg:width="3.1807in" svg:height="2.3846in" draw:z-index="2"><draw:image xlink:href="Pictures/1000000000000800000006009B4CC2B8.jpg" xlink:type="simple" xlink:show="embed" xlink:actuate="onLoad" draw:mime-type="image/jpeg"/></draw:frame>4. Plug the serial hat on the Pi</text:p>
          </table:table-cell>
        </table:table-row>
        <table:table-row>
          <table:table-cell table:style-name="Table1.A1" office:value-type="string">
            <text:p text:style-name="P6"><draw:frame draw:style-name="fr2" draw:name="Image5" text:anchor-type="char" svg:width="3.1862in" svg:height="2.3898in" draw:z-index="1"><draw:image xlink:href="Pictures/1000000000000800000006003E94DAFC.jpg" xlink:type="simple" xlink:show="embed" xlink:actuate="onLoad" draw:mime-type="image/jpeg"/></draw:frame>5. Rotate 90°, <text:span text:style-name="T2">minding that</text:span> the screws stay in place <text:span text:style-name="T2">enough </text:span>to hold the spacers</text:p>
          </table:table-cell>
          <table:table-cell table:style-name="Table1.A1" office:value-type="string">
            <text:p text:style-name="P6"><draw:frame draw:style-name="fr1" draw:name="Image6" text:anchor-type="char" svg:x="0.0055in" svg:y="0in" svg:width="3.1638in" svg:height="2.3728in" draw:z-index="0"><draw:image xlink:href="Pictures/1000000000000800000006000B4250EE.jpg" xlink:type="simple" xlink:show="embed" xlink:actuate="onLoad" draw:mime-type="image/jpeg"/></draw:frame>6. Screw shut and insert the microSD card</text:p>
          </table:table-cell>
        </table:table-row>
      </table:table>
      <text:p text:style-name="P7"/>
      <text:h text:style-name="P11" text:outline-level="2">Software installation</text:h>
      <text:p text:style-name="P3">If you start from scratch, get the latest surl-server image from <text:a xlink:type="simple" xlink:href="https://github.com/colinleroy/a2tools/releases" text:style-name="Internet_20_link" text:visited-style-name="Visited_20_Internet_20_Link">https://github.com/colinleroy/a2tools/releases</text:a> and dump it on a microSD card. </text:p>
      <text:p text:style-name="P3">From a Linux computer, the procedure is something like:</text:p>
      <text:p text:style-name="Preformatted_20_Text"><text:tab/>gunzip surl-server-RELEASE-YYYY-MM-DD-lite.img.gz</text:p>
      <text:p text:style-name="Preformatted_20_Text"><text:tab/>sudo dd if=surl-server-RELEASE-YYYY-MM-DD-lite.img of=/dev/mmcblk0</text:p>
      <text:p text:style-name="Preformatted_20_Text"><text:tab/>sync &amp;&amp; sudo eject /dev/mmcblk0</text:p>
      <text:p text:style-name="Preformatted_20_Text"/>
      <text:p text:style-name="P3">More details are available at <text:a xlink:type="simple" xlink:href="https://www.colino.net/wordpress/surl-server-a-serial-proxy-for-8bit-computers/" text:style-name="Internet_20_link" text:visited-style-name="Visited_20_Internet_20_Link">https://www.colino.net/wordpress/surl-server-a-serial-proxy-for-8bit-computers/</text:a>. </text:p>
      <text:p text:style-name="P3"/>
      <text:p text:style-name="P3">If you already are a surl-server user, update surl-server to the latest version:</text:p>
      <text:p text:style-name="P4"><text:tab/><text:span text:style-name="T1">sudo apt update &amp;&amp; sudo apt install surl-server</text:span></text:p>
      <text:p text:style-name="P4"/>
      <text:p text:style-name="P3">Enable the relevant UARTs in /boot/firmware/config.txt:</text:p>
      <text:p text:style-name="P5"><text:tab/>[<text:span text:style-name="T3">pi4</text:span>]</text:p>
      <text:p text:style-name="P5"><text:tab/>enable_uart=1</text:p>
      <text:p text:style-name="P5"><text:tab/>dtoverlay=uart2</text:p>
      <text:p text:style-name="P5"><text:tab/>dtoverlay=uart3</text:p>
      <text:p text:style-name="P5"><text:tab/>[<text:span text:style-name="T3">pi5</text:span>]</text:p>
      <text:p text:style-name="P5"><text:tab/>enable_uart=1</text:p>
      <text:p text:style-name="P5"><text:tab/>dtoverlay=uart<text:span text:style-name="T3">1-pi5</text:span></text:p>
      <text:p text:style-name="P5"><text:tab/>dtoverlay=uart<text:span text:style-name="T3">2-pi5</text:span></text:p>
      <text:p text:style-name="P5"/>
      <text:p text:style-name="P3">Delete the existing surl-server configuration file:</text:p>
      <text:p text:style-name="P4"><text:tab/><text:span text:style-name="T1">rm /etc/a2tools/tty.conf</text:span></text:p>
      <text:p text:style-name="P3">And finally, reboot:</text:p>
      <text:p text:style-name="P4"><text:tab/><text:span text:style-name="T1">sudo reboot</text:span></text:p>
      <text:p text:style-name="P3">The serial hat’s serial connectors should be used by surl-server after the reboot. If needed, look at the logs using:</text:p>
      <text:p text:style-name="P4"><text:tab/>journalctl -u surl-server.service --lines 50 -f</text:p>
      <text:p text:style-name="P3"/>
      <text:p text:style-name="P8">I am available for support at <text:a xlink:type="simple" xlink:href="mailto:colin@colino.net" text:style-name="Internet_20_link" text:visited-style-name="Visited_20_Internet_20_Link">colin@colino.net</text:a>.</text:p>
      <text:p text:style-name="P8">Have fun!</text:p>
      <text:p text:style-name="P8">Colin</text:p>
      <text:h text:style-name="P12" text:outline-level="2">Note for the Super Serial Cards setup on the Apple IIe</text:h>
      <text:p text:style-name="P15">By default, the <text:span text:style-name="T5">serial hat</text:span> need<text:span text:style-name="T5">s</text:span> both cards setup in Modem mode, with interrupts on:</text:p>
      <text:list text:style-name="L1">
        <text:list-item>
          <text:p text:style-name="P14">Jumper block pointing towards Modem</text:p>
        </text:list-item>
        <text:list-item>
          <text:p text:style-name="P16">Modem mode: SW1-5 and SW1-6 should be ON (closed)</text:p>
        </text:list-item>
        <text:list-item>
          <text:p text:style-name="P16">Interrupts: SW2-6 should be ON (closed)</text:p>
        </text:list-item>
        <text:list-item>
          <text:p text:style-name="P16"><draw:frame draw:style-name="fr1" draw:name="Image2 Copy 1" text:anchor-type="char" svg:x="4.0984in" svg:y="-0.0854in" svg:width="3.1563in" svg:height="2.4319in" draw:z-index="6"><draw:image xlink:href="Pictures/100000010000029F000002054EBD5246.png" xlink:type="simple" xlink:show="embed" xlink:actuate="onLoad" draw:mime-type="image/png"/></draw:frame>RS232C signals: SW1-7 should be ON (closed) and SW2-7 OFF (open)</text:p>
        </text:list-item>
      </text:list>
      <text:p text:style-name="P15">If your Super Serial Card in set to printer mode (Jumper block pointing towards Terminal, SW1-5 OFF, SW1-6 ON), you can open the DIN-5 to DB-25 adapter enclosure<text:span text:style-name="T5">s</text:span>, and turn both jumper blocks <text:span text:style-name="T4">(pictured right) </text:span>90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07T20:48:30.663895256</dc:date>
    <meta:editing-duration>P1DT23H23M4S</meta:editing-duration>
    <meta:editing-cycles>343</meta:editing-cycles>
    <meta:generator>LibreOffice/24.2.7.2$Linux_X86_64 LibreOffice_project/420$Build-2</meta:generator>
    <meta:print-date>2026-06-06T19:18:17.567145874</meta:print-date>
    <meta:document-statistic meta:table-count="1" meta:image-count="7" meta:object-count="0" meta:page-count="3" meta:paragraph-count="46" meta:word-count="304" meta:character-count="2011" meta:non-whitespace-character-count="1741"/>
  </office:meta>
</office:document-meta>
</file>