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800000006000B4250EE.jpg" manifest:media-type="image/jpeg"/>
  <manifest:file-entry manifest:full-path="Pictures/100000010000029F000002054EBD5246.png" manifest:media-type="image/png"/>
  <manifest:file-entry manifest:full-path="Pictures/1000000000000800000006003E94DAFC.jpg" manifest:media-type="image/jpeg"/>
  <manifest:file-entry manifest:full-path="Pictures/100000000000080000000600D87270E6.jpg" manifest:media-type="image/jpeg"/>
  <manifest:file-entry manifest:full-path="Pictures/1000000000000800000006009B4CC2B8.jpg" manifest:media-type="image/jpeg"/>
  <manifest:file-entry manifest:full-path="Pictures/10000000000008000000060092DA14E0.jpg" manifest:media-type="image/jpeg"/>
  <manifest:file-entry manifest:full-path="Pictures/100000000000080000000600B41E4114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atin Modern Mono" svg:font-family="'Latin Modern Mono'" style:font-pitch="fixed"/>
    <style:font-face style:name="Latin Modern Mono1" svg:font-family="'Latin Modern Mono'" style:font-adornments="10 Regular" style:font-pitch="fixed"/>
    <style:font-face style:name="Latin Modern Mono2" svg:font-family="'Latin Modern Mono'" style:font-adornments="Bold" style:font-pitch="fixed"/>
    <style:font-face style:name="Latin Modern Mono3" svg:font-family="'Latin Modern Mono'" style:font-adornments="Regular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6951in" table:align="margins"/>
    </style:style>
    <style:style style:name="Table1.A" style:family="table-column">
      <style:table-column-properties style:column-width="3.2479in" style:rel-column-width="31792*"/>
    </style:style>
    <style:style style:name="Table1.B" style:family="table-column">
      <style:table-column-properties style:column-width="3.4472in" style:rel-column-width="33743*"/>
    </style:style>
    <style:style style:name="Table1.A1" style:family="table-cell">
      <style:table-cell-properties fo:padding="0in" fo:border="none" style:writing-mode="pag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style:font-name="Latin Modern Mono" fo:font-size="16pt" fo:font-weight="bold" officeooo:rsid="00108780" officeooo:paragraph-rsid="00108780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end" style:justify-single-word="false"/>
      <style:text-properties style:font-name="Latin Modern Mono" fo:font-size="16pt" fo:font-weight="bold" officeooo:rsid="0172168e" officeooo:paragraph-rsid="0172168e" style:font-size-asian="16pt" style:font-weight-asian="bold" style:font-size-complex="16pt" style:font-weight-complex="bold"/>
    </style:style>
    <style:style style:name="P4" style:family="paragraph" style:parent-style-name="Text_20_body">
      <style:text-properties officeooo:rsid="0187a2f6" officeooo:paragraph-rsid="0187a2f6"/>
    </style:style>
    <style:style style:name="P5" style:family="paragraph" style:parent-style-name="Preformatted_20_Text">
      <style:text-properties officeooo:paragraph-rsid="0187a2f6"/>
    </style:style>
    <style:style style:name="P6" style:family="paragraph" style:parent-style-name="Preformatted_20_Text">
      <style:text-properties officeooo:paragraph-rsid="018a24de"/>
    </style:style>
    <style:style style:name="P7" style:family="paragraph" style:parent-style-name="Table_20_Contents">
      <style:text-properties officeooo:rsid="0186193c" officeooo:paragraph-rsid="0186193c"/>
    </style:style>
    <style:style style:name="P8" style:family="paragraph" style:parent-style-name="Text_20_body">
      <style:text-properties officeooo:rsid="01880e6d" officeooo:paragraph-rsid="01880e6d"/>
    </style:style>
    <style:style style:name="P9" style:family="paragraph" style:parent-style-name="Text_20_body">
      <style:text-properties officeooo:rsid="01863516" officeooo:paragraph-rsid="018bc19d"/>
    </style:style>
    <style:style style:name="P10" style:family="paragraph" style:parent-style-name="Text_20_body">
      <style:text-properties fo:font-weight="normal" officeooo:rsid="018cb5d5" officeooo:paragraph-rsid="018cb5d5" style:font-weight-asian="normal" style:font-weight-complex="normal"/>
    </style:style>
    <style:style style:name="P11" style:family="paragraph" style:parent-style-name="Standard" style:master-page-name="First_20_Page">
      <style:paragraph-properties fo:text-align="end" style:justify-single-word="false" style:page-number="auto"/>
      <style:text-properties style:font-name="Latin Modern Mono" fo:font-size="16pt" fo:font-weight="bold" officeooo:rsid="00108780" officeooo:paragraph-rsid="00108780" style:font-size-asian="16pt" style:font-weight-asian="bold" style:font-size-complex="16pt" style:font-weight-complex="bold"/>
    </style:style>
    <style:style style:name="P12" style:family="paragraph" style:parent-style-name="Heading_20_2">
      <style:paragraph-properties fo:break-before="page"/>
      <style:text-properties officeooo:rsid="0187a2f6" officeooo:paragraph-rsid="0187a2f6"/>
    </style:style>
    <style:style style:name="P13" style:family="paragraph" style:parent-style-name="Heading_20_2">
      <style:paragraph-properties fo:break-before="page"/>
      <style:text-properties officeooo:rsid="01863516" officeooo:paragraph-rsid="018bc19d"/>
    </style:style>
    <style:style style:name="P14" style:family="paragraph" style:parent-style-name="Text_20_body" style:list-style-name="L1">
      <style:text-properties officeooo:paragraph-rsid="018bc19d"/>
    </style:style>
    <style:style style:name="P15" style:family="paragraph" style:parent-style-name="Text_20_body" style:list-style-name="L1">
      <style:text-properties officeooo:rsid="01863516" officeooo:paragraph-rsid="018bc19d"/>
    </style:style>
    <style:style style:name="T1" style:family="text">
      <style:text-properties officeooo:rsid="0187a2f6"/>
    </style:style>
    <style:style style:name="T2" style:family="text">
      <style:text-properties officeooo:rsid="018942ac"/>
    </style:style>
    <style:style style:name="T3" style:family="text">
      <style:text-properties officeooo:rsid="018a24de"/>
    </style:style>
    <style:style style:name="T4" style:family="text">
      <style:text-properties officeooo:rsid="018770e9"/>
    </style:style>
    <style:style style:name="T5" style:family="text">
      <style:text-properties officeooo:rsid="018bc19d"/>
    </style:style>
    <style:style style:name="T6" style:family="text">
      <style:text-properties officeooo:rsid="018cb5d5"/>
    </style:style>
    <style:style style:name="T7" style:family="text">
      <style:text-properties officeooo:rsid="018e772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run-through="foreground" style:wrap="dynamic" style:number-wrapped-paragraphs="no-limit" style:wrap-contour="false" style:vertical-pos="top" style:vertical-rel="paragraph" style:horizontal-pos="center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surl-server Raspberry Pi 4/5 serial hat for Apple II</text:p>
      <text:p text:style-name="P2"/>
      <text:p text:style-name="P3">Quickstart</text:p>
      <text:h text:style-name="Heading_20_2" text:outline-level="2">Kit assembly is done in a few steps: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7"><draw:frame draw:style-name="fr3" draw:name="Image1" text:anchor-type="char" svg:width="3.1846in" svg:height="2.3882in" draw:z-index="5"><draw:image xlink:href="Pictures/100000000000080000000600B41E4114.jpg" xlink:type="simple" xlink:show="embed" xlink:actuate="onLoad" draw:mime-type="image/jpeg"/></draw:frame>1. Insert four screws at the bottom of the case</text:p>
          </table:table-cell>
          <table:table-cell table:style-name="Table1.A1" office:value-type="string">
            <text:p text:style-name="P7"><draw:frame draw:style-name="fr1" draw:name="Image2" text:anchor-type="char" svg:x="0.0138in" svg:y="0in" svg:width="3.1791in" svg:height="2.3839in" draw:z-index="4"><draw:image xlink:href="Pictures/10000000000008000000060092DA14E0.jpg" xlink:type="simple" xlink:show="embed" xlink:actuate="onLoad" draw:mime-type="image/jpeg"/></draw:frame>2. Position the Pi in the case</text:p>
          </table:table-cell>
        </table:table-row>
        <table:table-row>
          <table:table-cell table:style-name="Table1.A1" office:value-type="string">
            <text:p text:style-name="P7"><draw:frame draw:style-name="fr2" draw:name="Image3" text:anchor-type="char" svg:width="3.1862in" svg:height="2.3898in" draw:z-index="3"><draw:image xlink:href="Pictures/100000000000080000000600D87270E6.jpg" xlink:type="simple" xlink:show="embed" xlink:actuate="onLoad" draw:mime-type="image/jpeg"/></draw:frame>3. Insert spacers on the screws<text:span text:style-name="T6">*</text:span></text:p>
          </table:table-cell>
          <table:table-cell table:style-name="Table1.A1" office:value-type="string">
            <text:p text:style-name="P7"><draw:frame draw:style-name="fr1" draw:name="Image4" text:anchor-type="char" svg:x="0.0063in" svg:y="0in" svg:width="3.1807in" svg:height="2.3846in" draw:z-index="2"><draw:image xlink:href="Pictures/1000000000000800000006009B4CC2B8.jpg" xlink:type="simple" xlink:show="embed" xlink:actuate="onLoad" draw:mime-type="image/jpeg"/></draw:frame>4. Plug the serial hat on the Pi</text:p>
          </table:table-cell>
        </table:table-row>
        <table:table-row>
          <table:table-cell table:style-name="Table1.A1" office:value-type="string">
            <text:p text:style-name="P7"><draw:frame draw:style-name="fr2" draw:name="Image5" text:anchor-type="char" svg:width="3.1862in" svg:height="2.3898in" draw:z-index="1"><draw:image xlink:href="Pictures/1000000000000800000006003E94DAFC.jpg" xlink:type="simple" xlink:show="embed" xlink:actuate="onLoad" draw:mime-type="image/jpeg"/></draw:frame>5. Rotate 90°, <text:span text:style-name="T2">minding that</text:span> the screws stay in place <text:span text:style-name="T2">enough </text:span>to hold the spacers</text:p>
          </table:table-cell>
          <table:table-cell table:style-name="Table1.A1" office:value-type="string">
            <text:p text:style-name="P7"><draw:frame draw:style-name="fr1" draw:name="Image6" text:anchor-type="char" svg:x="0.0055in" svg:y="0in" svg:width="3.1638in" svg:height="2.3728in" draw:z-index="0"><draw:image xlink:href="Pictures/1000000000000800000006000B4250EE.jpg" xlink:type="simple" xlink:show="embed" xlink:actuate="onLoad" draw:mime-type="image/jpeg"/></draw:frame>6. Screw shut and insert the microSD card</text:p>
          </table:table-cell>
        </table:table-row>
      </table:table>
      <text:p text:style-name="P10">*2mm spacers with Geekworm P165-A heatsink, 11mm otherwise</text:p>
      <text:h text:style-name="P12" text:outline-level="2">Software installation</text:h>
      <text:p text:style-name="P4">If you start from scratch, get the latest surl-server image from <text:a xlink:type="simple" xlink:href="https://github.com/colinleroy/a2tools/releases" text:style-name="Internet_20_link" text:visited-style-name="Visited_20_Internet_20_Link">https://github.com/colinleroy/a2tools/releases</text:a> and dump it on a microSD card. </text:p>
      <text:p text:style-name="P4">From a Linux computer, the procedure is something like:</text:p>
      <text:p text:style-name="Preformatted_20_Text"><text:tab/>gunzip surl-server-RELEASE-YYYY-MM-DD-lite.img.gz</text:p>
      <text:p text:style-name="Preformatted_20_Text"><text:tab/>sudo dd if=surl-server-RELEASE-YYYY-MM-DD-lite.img of=/dev/mmcblk0</text:p>
      <text:p text:style-name="Preformatted_20_Text"><text:tab/>sync &amp;&amp; sudo eject /dev/mmcblk0</text:p>
      <text:p text:style-name="Preformatted_20_Text"/>
      <text:p text:style-name="P4">More details are available at <text:a xlink:type="simple" xlink:href="https://www.colino.net/wordpress/surl-server-a-serial-proxy-for-8bit-computers/" text:style-name="Internet_20_link" text:visited-style-name="Visited_20_Internet_20_Link">https://www.colino.net/wordpress/surl-server-a-serial-proxy-for-8bit-computers/</text:a>. </text:p>
      <text:p text:style-name="P4"/>
      <text:p text:style-name="P4">If you already are a surl-server user, update surl-server to the latest version:</text:p>
      <text:p text:style-name="P5"><text:tab/><text:span text:style-name="T1">sudo apt update &amp;&amp; sudo apt install surl-server</text:span></text:p>
      <text:p text:style-name="P5"/>
      <text:p text:style-name="P4">Enable the relevant UARTs in /boot/firmware/config.txt:</text:p>
      <text:p text:style-name="P6"><text:tab/>[<text:span text:style-name="T3">pi4</text:span>]</text:p>
      <text:p text:style-name="P6"><text:tab/>enable_uart=1</text:p>
      <text:p text:style-name="P6"><text:tab/>dtoverlay=uart2</text:p>
      <text:p text:style-name="P6"><text:tab/>dtoverlay=uart3</text:p>
      <text:p text:style-name="P6"><text:tab/>[<text:span text:style-name="T3">pi5</text:span>]</text:p>
      <text:p text:style-name="P6"><text:tab/>enable_uart=1</text:p>
      <text:p text:style-name="P6"><text:tab/>dtoverlay=uart<text:span text:style-name="T3">1-pi5</text:span></text:p>
      <text:p text:style-name="P6"><text:tab/>dtoverlay=uart<text:span text:style-name="T3">2-pi5</text:span></text:p>
      <text:p text:style-name="P6"/>
      <text:p text:style-name="P4">Delete the existing surl-server configuration file:</text:p>
      <text:p text:style-name="P5"><text:tab/><text:span text:style-name="T1">rm /etc/a2tools/tty.conf</text:span></text:p>
      <text:p text:style-name="P4">And finally, reboot:</text:p>
      <text:p text:style-name="P5"><text:tab/><text:span text:style-name="T1">sudo reboot</text:span></text:p>
      <text:p text:style-name="P4">The serial hat’s serial connectors should be used by surl-server after the reboot. If needed, look at the logs using:</text:p>
      <text:p text:style-name="P5"><text:tab/>journalctl -u surl-server.service --lines 50 -f</text:p>
      <text:p text:style-name="P4"/>
      <text:p text:style-name="P8">I am available for support at <text:a xlink:type="simple" xlink:href="mailto:colin@colino.net" text:style-name="Internet_20_link" text:visited-style-name="Visited_20_Internet_20_Link">colin@colino.net</text:a>.</text:p>
      <text:p text:style-name="P8">Have fun!</text:p>
      <text:p text:style-name="P8">Colin</text:p>
      <text:h text:style-name="P13" text:outline-level="2">Note for the Super Serial Cards setup on the Apple IIe</text:h>
      <text:p text:style-name="P9">By default, the <text:span text:style-name="T5">serial hat</text:span> need<text:span text:style-name="T5">s</text:span> both cards setup in Modem mode, with interrupts on:</text:p>
      <text:list text:style-name="L1">
        <text:list-item>
          <text:p text:style-name="P15">Jumper block pointing towards Modem</text:p>
        </text:list-item>
        <text:list-item>
          <text:p text:style-name="P14">Modem mode: SW1-5 and SW1-6 should be ON (closed)</text:p>
        </text:list-item>
        <text:list-item>
          <text:p text:style-name="P14">Interrupts: SW2-6 should be ON (closed)</text:p>
        </text:list-item>
        <text:list-item>
          <text:p text:style-name="P14"><draw:frame draw:style-name="fr1" draw:name="Image2 Copy 1" text:anchor-type="char" svg:x="4.0984in" svg:y="-0.0854in" svg:width="3.1563in" svg:height="2.4319in" draw:z-index="6"><draw:image xlink:href="Pictures/100000010000029F000002054EBD5246.png" xlink:type="simple" xlink:show="embed" xlink:actuate="onLoad" draw:mime-type="image/png"/></draw:frame>RS232C signals: SW1-7 should be ON (closed) and SW2-7 OFF (open)</text:p>
        </text:list-item>
      </text:list>
      <text:p text:style-name="P9">If your Super Serial Card in set to printer mode (Jumper block pointing towards Terminal, SW1-5 OFF, SW1-6 ON), you can open the DIN-5 to DB-25 adapter enclosure<text:span text:style-name="T5">s</text:span>, and turn both jumper blocks <text:span text:style-name="T4">(pictured right) </text:span>90°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atin Modern Mono" svg:font-family="'Latin Modern Mono'" style:font-pitch="fixed"/>
    <style:font-face style:name="Latin Modern Mono1" svg:font-family="'Latin Modern Mono'" style:font-adornments="10 Regular" style:font-pitch="fixed"/>
    <style:font-face style:name="Latin Modern Mono2" svg:font-family="'Latin Modern Mono'" style:font-adornments="Bold" style:font-pitch="fixed"/>
    <style:font-face style:name="Latin Modern Mono3" svg:font-family="'Latin Modern Mono'" style:font-adornments="Regular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style:font-name="Latin Modern Mono1" fo:font-family="'Latin Modern Mono'" style:font-style-name="10 Regular" style:font-pitch="fixed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style:font-name="Latin Modern Mono" fo:font-family="'Latin Modern Mono'" style:font-pitch="fixed"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style:font-name="Latin Modern Mono" fo:font-family="'Latin Modern Mono'" style:font-pitch="fixed" fo:font-size="12pt" fo:font-weight="bold" officeooo:rsid="00108780" style:font-size-asian="12pt" style:font-weight-asian="bold" style:font-size-complex="12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style:font-name="Latin Modern Mono" fo:font-family="'Latin Modern Mono'" style:font-pitch="fixed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  <style:text-properties style:font-name="Latin Modern Mono1" fo:font-family="'Latin Modern Mono'" style:font-style-name="10 Regular" style:font-pitch="fixe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  <style:text-properties style:font-name="Latin Modern Mono1" fo:font-family="'Latin Modern Mono'" style:font-style-name="10 Regular" style:font-pitch="fixed"/>
    </style:style>
    <style:style style:name="Figure" style:family="paragraph" style:parent-style-name="Caption" style:class="extra">
      <style:text-properties style:font-name="Latin Modern Mono1" fo:font-family="'Latin Modern Mono'" style:font-style-name="10 Regular" style:font-pitch="fixed" fo:font-size="10pt" fo:font-style="normal"/>
    </style:style>
    <style:style style:name="User_20_Index_20_Heading" style:display-name="User Index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Figure_20_Index_20_Heading" style:display-name="Figure Index Heading" style:family="paragraph" style:parent-style-name="Index_20_Heading" style:default-outline-level="1" style:list-style-name="" style:class="index">
      <style:paragraph-properties fo:margin-left="0in" fo:margin-right="0in" fo:text-indent="0in" style:auto-text-indent="false" text:number-lines="false" text:line-number="0"/>
      <style:text-properties style:font-name="Latin Modern Mono2" fo:font-family="'Latin Modern Mono'" style:font-style-name="Bold" style:font-pitch="fixed"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  <style:text-properties style:font-name="Latin Modern Mono1" fo:font-family="'Latin Modern Mono'" style:font-style-name="10 Regular" style:font-pitch="fixe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  <style:text-properties style:font-name="Latin Modern Mono3" fo:font-family="'Latin Modern Mono'" style:font-style-name="Regular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style:font-name="Latin Modern Mono" fo:font-family="'Latin Modern Mono'" style:font-pitch="fixed" fo:font-weight="bold" officeooo:rsid="0020c7a4" style:font-weight-asian="bold" style:font-weight-complex="bold"/>
    </style:style>
    <style:style style:name="Table" style:family="paragraph" style:parent-style-name="Caption" style:class="extra">
      <style:paragraph-properties fo:padding="0.0201in" fo:border="none"/>
      <style:text-properties style:font-name="Latin Modern Mono1" fo:font-family="'Latin Modern Mono'" style:font-style-name="10 Regular" style:font-pitch="fixed" fo:font-style="normal"/>
    </style:style>
    <style:style style:name="Table_20_index_20_heading" style:display-name="Table index heading" style:family="paragraph" style:parent-style-name="Index_20_Heading" style:default-outline-level="1" style:list-style-name="" style:class="index">
      <style:paragraph-properties fo:margin-left="0in" fo:margin-right="0in" fo:text-indent="0in" style:auto-text-indent="false" text:number-lines="false" text:line-number="0"/>
      <style:text-properties style:font-name="Latin Modern Mono2" fo:font-family="'Latin Modern Mono'" style:font-style-name="Bold" style:font-pitch="fixed"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  <style:text-properties style:font-name="Latin Modern Mono1" fo:font-family="'Latin Modern Mono'" style:font-style-name="10 Regular" style:font-pitch="fixe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style:font-name="Latin Modern Mono1" fo:font-family="'Latin Modern Mono'" style:font-style-name="10 Regular" style:font-pitch="fixed"/>
    </style:style>
    <style:style style:name="Frame_20_contents" style:display-name="Frame contents" style:family="paragraph" style:parent-style-name="Standard" style:class="extra"/>
    <style:style style:name="Contents_20_10" style:display-name="Contents 10" style:family="paragraph" style:parent-style-name="Index" style:class="index">
      <style:paragraph-properties fo:margin-left="1.7717in" fo:margin-right="0in" fo:text-indent="0in" style:auto-text-indent="false">
        <style:tab-stops>
          <style:tab-stop style:position="4.9236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Footnote" style:family="paragraph" style:parent-style-name="Standard" style:class="extra" style:master-page-name="">
      <style:paragraph-properties fo:margin-left="0.2362in" fo:margin-right="0in" fo:text-indent="-0.2362in" style:auto-text-indent="false" style:page-number="auto" text:number-lines="false" text:line-number="0"/>
      <style:text-properties style:font-name="Latin Modern Mono1" fo:font-family="'Latin Modern Mono'" style:font-style-name="10 Regular" style:font-pitch="fixed" fo:font-size="10pt" style:font-size-asian="10pt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1965in" fo:text-indent="0in" style:auto-text-indent="false"/>
    </style:style>
    <style:style style:name="List_20_1" style:display-name="List 1" style:family="paragraph" style:parent-style-name="List" style:class="list">
      <style:paragraph-properties fo:margin-left="0.25in" fo:margin-top="0in" fo:margin-bottom="0.0835in" style:contextual-spacing="false" fo:text-indent="-0.25in" style:auto-text-indent="false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701in" fo:page-height="11.6902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02in" fo:page-height="8.270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8.2701in" fo:page-height="11.6902in" style:num-format="i" style:print-orientation="portrait" fo:margin-top="1in" fo:margin-bottom="1in" fo:margin-left="1.25in" fo:margin-right="1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3</text:page-number></text:p>
      </style:footer>
      <style:footer-left>
        <text:p text:style-name="MP1"/>
      </style:footer-left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  <style:master-page style:name="Forepages" style:page-layout-name="Mpm9" draw:style-name="Mdp1">
      <style:footer>
        <text:p text:style-name="Footer"><text:page-number text:select-page="current">0</text:page-number></text:p>
      </style:footer>
      <style:footer-left>
        <text:p text:style-name="MP1"><text:page-number text:select-page="current">0</text:page-number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9T21:14:51.144711740</meta:creation-date>
    <dc:date>2026-07-03T15:38:40.179111267</dc:date>
    <meta:editing-duration>P3DT1H29M2S</meta:editing-duration>
    <meta:editing-cycles>345</meta:editing-cycles>
    <meta:generator>LibreOffice/24.2.7.2$Linux_X86_64 LibreOffice_project/420$Build-2</meta:generator>
    <meta:print-date>2026-06-06T19:18:17.567145874</meta:print-date>
    <meta:document-statistic meta:table-count="1" meta:image-count="7" meta:object-count="0" meta:page-count="3" meta:paragraph-count="47" meta:word-count="312" meta:character-count="2070" meta:non-whitespace-character-count="1793"/>
  </office:meta>
</office:document-meta>
</file>