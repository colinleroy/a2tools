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6.6951in" table:align="margins"/>
    </style:style>
    <style:style style:name="Table3.A" style:family="table-column">
      <style:table-column-properties style:column-width="1.3111in" style:rel-column-width="1889*"/>
    </style:style>
    <style:style style:name="Table3.B" style:family="table-column">
      <style:table-column-properties style:column-width="1.5625in" style:rel-column-width="2251*"/>
    </style:style>
    <style:style style:name="Table3.C" style:family="table-column">
      <style:table-column-properties style:column-width="3.8215in" style:rel-column-width="5505*"/>
    </style:style>
    <style:style style:name="Table3.A1" style:family="table-cell">
      <style:table-cell-properties fo:padding="0in" fo:border="none"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text-properties style:font-name="Latin Modern Mono" fo:font-weight="normal" officeooo:rsid="001acb08" officeooo:paragraph-rsid="001acb08" style:font-weight-asian="normal" style:font-weight-complex="normal"/>
    </style:style>
    <style:style style:name="P4"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1058066" officeooo:paragraph-rsid="01058066" style:font-weight-asian="normal" style:font-weight-complex="normal"/>
    </style:style>
    <style:style style:name="P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officeooo:paragraph-rsid="001acb08"/>
    </style:style>
    <style:style style:name="P9" style:family="paragraph" style:parent-style-name="Contents_20_1">
      <style:paragraph-properties>
        <style:tab-stops>
          <style:tab-stop style:position="5.7693in" style:type="right" style:leader-style="dotted" style:leader-text="."/>
        </style:tab-stops>
      </style:paragraph-properties>
    </style:style>
    <style:style style:name="P10" style:family="paragraph" style:parent-style-name="Contents_20_2">
      <style:paragraph-properties>
        <style:tab-stops>
          <style:tab-stop style:position="5.5728in" style:type="right" style:leader-style="dotted" style:leader-text="."/>
        </style:tab-stops>
      </style:paragraph-properties>
    </style:style>
    <style:style style:name="P11" style:family="paragraph" style:parent-style-name="Contents_20_Heading" style:master-page-name="Forepages">
      <style:paragraph-properties style:page-number="auto"/>
    </style:style>
    <style:style style:name="P12" style:family="paragraph" style:parent-style-name="Heading_20_1">
      <style:text-properties officeooo:rsid="0074f29c" officeooo:paragraph-rsid="001c9030"/>
    </style:style>
    <style:style style:name="P13" style:family="paragraph" style:parent-style-name="Heading_20_1" style:master-page-name="Standard">
      <style:paragraph-properties style:page-number="auto"/>
      <style:text-properties officeooo:rsid="0074f29c" officeooo:paragraph-rsid="0074f29c"/>
    </style:style>
    <style:style style:name="P14" style:family="paragraph" style:parent-style-name="Heading_20_1">
      <style:paragraph-properties fo:break-before="page"/>
      <style:text-properties officeooo:paragraph-rsid="001c9030"/>
    </style:style>
    <style:style style:name="P15" style:family="paragraph" style:parent-style-name="Heading_20_1">
      <style:paragraph-properties fo:break-before="page"/>
      <style:text-properties officeooo:rsid="011b27ed" officeooo:paragraph-rsid="011b27ed"/>
    </style:style>
    <style:style style:name="P16" style:family="paragraph" style:parent-style-name="Heading_20_1">
      <style:paragraph-properties fo:break-before="page"/>
      <style:text-properties officeooo:rsid="011f68f7" officeooo:paragraph-rsid="011f68f7"/>
    </style:style>
    <style:style style:name="P17" style:family="paragraph" style:parent-style-name="Heading_20_2">
      <style:text-properties officeooo:rsid="00dd6a7f" officeooo:paragraph-rsid="00dd6a7f"/>
    </style:style>
    <style:style style:name="P18" style:family="paragraph" style:parent-style-name="Heading_20_2">
      <style:text-properties officeooo:rsid="011b27ed" officeooo:paragraph-rsid="011b27ed"/>
    </style:style>
    <style:style style:name="P19" style:family="paragraph" style:parent-style-name="Heading_20_2">
      <style:text-properties officeooo:rsid="011dc4a8" officeooo:paragraph-rsid="011dc4a8"/>
    </style:style>
    <style:style style:name="P20" style:family="paragraph" style:parent-style-name="Heading_20_2">
      <style:text-properties officeooo:rsid="011f68f7" officeooo:paragraph-rsid="011f68f7"/>
    </style:style>
    <style:style style:name="P21" style:family="paragraph" style:parent-style-name="Preformatted_20_Text">
      <style:text-properties officeooo:paragraph-rsid="011f68f7"/>
    </style:style>
    <style:style style:name="P22"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23" style:family="paragraph" style:parent-style-name="Standard">
      <style:paragraph-properties fo:text-align="end" style:justify-single-word="false"/>
      <style:text-properties style:font-name="Latin Modern Mono" fo:font-weight="normal" officeooo:rsid="001acb08" officeooo:paragraph-rsid="00108780" style:font-weight-asian="normal" style:font-weight-complex="normal"/>
    </style:style>
    <style:style style:name="P24" style:family="paragraph" style:parent-style-name="Table">
      <style:paragraph-properties fo:keep-with-next="always"/>
    </style:style>
    <style:style style:name="P25" style:family="paragraph" style:parent-style-name="Table_20_Contents">
      <style:text-properties style:font-name="Latin Modern Mono1" officeooo:rsid="011087fd" officeooo:paragraph-rsid="011087fd"/>
    </style:style>
    <style:style style:name="P26" style:family="paragraph" style:parent-style-name="Table_20_Contents">
      <style:text-properties style:font-name="Latin Modern Mono1" officeooo:rsid="011087fd" officeooo:paragraph-rsid="0113aec2"/>
    </style:style>
    <style:style style:name="P27" style:family="paragraph" style:parent-style-name="Table_20_Contents">
      <style:text-properties style:font-name="Latin Modern Mono1" fo:font-weight="bold" officeooo:rsid="011087fd" officeooo:paragraph-rsid="011087fd" style:font-weight-asian="bold" style:font-weight-complex="bold"/>
    </style:style>
    <style:style style:name="P28" style:family="paragraph" style:parent-style-name="Table_20_index_20_1">
      <style:paragraph-properties>
        <style:tab-stops>
          <style:tab-stop style:position="5.7693in" style:type="right" style:leader-style="dotted" style:leader-text="."/>
        </style:tab-stops>
      </style:paragraph-properties>
    </style:style>
    <style:style style:name="P29" style:family="paragraph" style:parent-style-name="Text_20_body">
      <style:text-properties officeooo:rsid="011087fd" officeooo:paragraph-rsid="011087fd"/>
    </style:style>
    <style:style style:name="P30" style:family="paragraph" style:parent-style-name="Text_20_body" style:list-style-name="L6">
      <style:text-properties officeooo:rsid="011087fd" officeooo:paragraph-rsid="011087fd"/>
    </style:style>
    <style:style style:name="P31" style:family="paragraph" style:parent-style-name="Text_20_body">
      <style:text-properties officeooo:rsid="0114b7e9" officeooo:paragraph-rsid="0114b7e9"/>
    </style:style>
    <style:style style:name="P32" style:family="paragraph" style:parent-style-name="Text_20_body" style:list-style-name="L7">
      <style:text-properties officeooo:rsid="0114b7e9" officeooo:paragraph-rsid="0114b7e9"/>
    </style:style>
    <style:style style:name="P33" style:family="paragraph" style:parent-style-name="Text_20_body">
      <style:text-properties officeooo:paragraph-rsid="0114b7e9"/>
    </style:style>
    <style:style style:name="P34" style:family="paragraph" style:parent-style-name="Text_20_body">
      <style:text-properties officeooo:rsid="0116a6ce" officeooo:paragraph-rsid="0116a6ce"/>
    </style:style>
    <style:style style:name="P35" style:family="paragraph" style:parent-style-name="Text_20_body">
      <style:text-properties officeooo:rsid="011a2761" officeooo:paragraph-rsid="011a2761"/>
    </style:style>
    <style:style style:name="P36" style:family="paragraph" style:parent-style-name="Text_20_body" style:list-style-name="L8">
      <style:text-properties officeooo:rsid="011a2761" officeooo:paragraph-rsid="011a2761"/>
    </style:style>
    <style:style style:name="P37" style:family="paragraph" style:parent-style-name="Text_20_body">
      <style:text-properties officeooo:rsid="011b27ed" officeooo:paragraph-rsid="011b27ed"/>
    </style:style>
    <style:style style:name="P38" style:family="paragraph" style:parent-style-name="Text_20_body">
      <style:text-properties officeooo:rsid="011d9a0f" officeooo:paragraph-rsid="011d9a0f"/>
    </style:style>
    <style:style style:name="P39" style:family="paragraph" style:parent-style-name="Text_20_body">
      <style:text-properties officeooo:rsid="011dc4a8" officeooo:paragraph-rsid="011dc4a8"/>
    </style:style>
    <style:style style:name="P40" style:family="paragraph" style:parent-style-name="Text_20_body">
      <style:text-properties officeooo:rsid="011f68f7" officeooo:paragraph-rsid="011f68f7"/>
    </style:style>
    <style:style style:name="P41" style:family="paragraph" style:parent-style-name="Text_20_body">
      <style:text-properties officeooo:rsid="0187a2f6" officeooo:paragraph-rsid="011f68f7"/>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officeooo:rsid="010fa0d3"/>
    </style:style>
    <style:style style:name="T4" style:family="text">
      <style:text-properties officeooo:rsid="011087fd"/>
    </style:style>
    <style:style style:name="T5" style:family="text">
      <style:text-properties officeooo:rsid="0113aec2"/>
    </style:style>
    <style:style style:name="T6" style:family="text">
      <style:text-properties officeooo:rsid="0114b7e9"/>
    </style:style>
    <style:style style:name="T7" style:family="text">
      <style:text-properties officeooo:rsid="0116a6ce"/>
    </style:style>
    <style:style style:name="T8" style:family="text">
      <style:text-properties officeooo:rsid="01183592"/>
    </style:style>
    <style:style style:name="T9" style:family="text">
      <style:text-properties officeooo:rsid="011f68f7"/>
    </style:style>
    <style:style style:name="T10" style:family="text">
      <style:text-properties officeooo:rsid="0187a2f6"/>
    </style:style>
    <style:style style:name="T11" style:family="text">
      <style:text-properties officeooo:rsid="018a24d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7"><text:span text:style-name="T3">Colin’s Integrated Serial Device</text:span> for Apple II</text:p>
      <text:p text:style-name="P7"/>
      <text:p text:style-name="P7">User guide</text:p>
      <text:p text:style-name="P23"/>
      <text:p text:style-name="P5"><text:span text:style-name="T3">July</text:span> 2026</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9"><text:a xlink:type="simple" xlink:href="#__RefHeading___Toc2088_1038169196" text:style-name="Index_20_Link" text:visited-style-name="Index_20_Link">Index of Figures<text:tab/>ii</text:a></text:p>
          <text:p text:style-name="P9"><text:a xlink:type="simple" xlink:href="#__RefHeading___Toc2090_1038169196" text:style-name="Index_20_Link" text:visited-style-name="Index_20_Link">Index of Tables<text:tab/>ii</text:a></text:p>
          <text:p text:style-name="P9"><text:a xlink:type="simple" xlink:href="#__RefHeading___Toc6618_899895566" text:style-name="Index_20_Link" text:visited-style-name="Index_20_Link">Introduction<text:tab/>3</text:a></text:p>
          <text:p text:style-name="P9"><text:a xlink:type="simple" xlink:href="#__RefHeading___Toc193_899895566" text:style-name="Index_20_Link" text:visited-style-name="Index_20_Link">Initial configuration<text:tab/>4</text:a></text:p>
          <text:p text:style-name="P10"><text:a xlink:type="simple" xlink:href="#__RefHeading___Toc195_899895566" text:style-name="Index_20_Link" text:visited-style-name="Index_20_Link">Requirements<text:tab/>4</text:a></text:p>
          <text:p text:style-name="P10"><text:a xlink:type="simple" xlink:href="#__RefHeading___Toc2092_1038169196" text:style-name="Index_20_Link" text:visited-style-name="Index_20_Link">Assembly<text:tab/>4</text:a></text:p>
          <text:p text:style-name="P10"><text:a xlink:type="simple" xlink:href="#__RefHeading___Toc2094_1038169196" text:style-name="Index_20_Link" text:visited-style-name="Index_20_Link">8-bits/16-bits switch<text:tab/>4</text:a></text:p>
          <text:p text:style-name="P9"><text:a xlink:type="simple" xlink:href="#__RefHeading___Toc2096_1038169196" text:style-name="Index_20_Link" text:visited-style-name="Index_20_Link">Usage<text:tab/>6</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28">Table 1: Matrix of possibilities<text:tab/>3</text:p>
        </text:index-body>
      </text:table-index>
      <text:h text:style-name="P12" text:outline-level="1" text:is-list-header="true"/>
      <text:h text:style-name="P13" text:outline-level="1"><text:bookmark-start text:name="__RefHeading___Toc6618_899895566"/>Introduction<text:bookmark-end text:name="__RefHeading___Toc6618_899895566"/></text:h>
      <text:p text:style-name="Text_20_body">The <text:span text:style-name="T3">CISD is </text:span><text:span text:style-name="T4">basically a serial switchbox, designed in a way that allows me to use all my Apple II serial devices without having to mess with cables connections. It allows to use different devices at the press of a button, and integrates the Rasperry Pi </text:span><text:span text:style-name="T7">(4 or 5) </text:span><text:span text:style-name="T4">proxy that I developed for my software projects.</text:span></text:p>
      <text:p text:style-name="P29">It allows to connect both the modem and printer serial ports of the Apple II to it, and then route these as follows:</text:p>
      <text:list text:style-name="L6">
        <text:list-item>
          <text:p text:style-name="P30">Modem and printer port to the surl-server proxy</text:p>
        </text:list-item>
        <text:list-item>
          <text:p text:style-name="P30">Modem and printer port to my Quicktake</text:p>
        </text:list-item>
        <text:list-item>
          <text:p text:style-name="P30">Modem port to another serial device – I connect another Apple II there</text:p>
        </text:list-item>
        <text:list-item>
          <text:p text:style-name="P30">Printer port to a physical ImageWriter (I or II)</text:p>
        </text:list-item>
      </text:list>
      <text:p text:style-name="P29">Here is a matrix of what is possible in different configurations:</text:p>
      <text:p text:style-name="P24">Table <text:sequence text:ref-name="refTable4" text:name="Table" text:formula="ooow:Table+1" style:num-format="1">1</text:sequence>: Matrix of possibilities</text:p>
      <table:table table:name="Table3" table:style-name="Table3">
        <table:table-column table:style-name="Table3.A"/>
        <table:table-column table:style-name="Table3.B"/>
        <table:table-column table:style-name="Table3.C"/>
        <table:table-row>
          <table:table-cell table:style-name="Table3.A1" office:value-type="string">
            <text:p text:style-name="P27">Modem selector</text:p>
          </table:table-cell>
          <table:table-cell table:style-name="Table3.A1" office:value-type="string">
            <text:p text:style-name="P27">Printer selector</text:p>
          </table:table-cell>
          <table:table-cell table:style-name="Table3.A1" office:value-type="string">
            <text:p text:style-name="P27">Use</text:p>
          </table:table-cell>
        </table:table-row>
        <table:table-row>
          <table:table-cell table:style-name="Table3.A1" office:value-type="string">
            <text:p text:style-name="P25">Proxy main</text:p>
          </table:table-cell>
          <table:table-cell table:style-name="Table3.A1" office:value-type="string">
            <text:p text:style-name="P25">Any</text:p>
          </table:table-cell>
          <table:table-cell table:style-name="Table3.A1" office:value-type="string">
            <text:p text:style-name="P26">Mastodon, Wozamp music, <text:span text:style-name="T5">STP, </text:span>SixForty, Weather, VSDrive, ADTPro, etc</text:p>
          </table:table-cell>
        </table:table-row>
        <table:table-row>
          <table:table-cell table:style-name="Table3.A1" office:value-type="string">
            <text:p text:style-name="P25">Proxy main</text:p>
          </table:table-cell>
          <table:table-cell table:style-name="Table3.A1" office:value-type="string">
            <text:p text:style-name="P25">Proxy aux</text:p>
          </table:table-cell>
          <table:table-cell table:style-name="Table3.A1" office:value-type="string">
            <text:p text:style-name="P25">Wozamp/Woztubes video</text:p>
          </table:table-cell>
        </table:table-row>
        <table:table-row>
          <table:table-cell table:style-name="Table3.A1" office:value-type="string">
            <text:p text:style-name="P25">Any</text:p>
          </table:table-cell>
          <table:table-cell table:style-name="Table3.A1" office:value-type="string">
            <text:p text:style-name="P25">Proxy aux</text:p>
          </table:table-cell>
          <table:table-cell table:style-name="Table3.A1" office:value-type="string">
            <text:p text:style-name="P25">Print to surl-server’s virtual printer</text:p>
          </table:table-cell>
        </table:table-row>
        <table:table-row>
          <table:table-cell table:style-name="Table3.A1" office:value-type="string">
            <text:p text:style-name="P25">Any</text:p>
          </table:table-cell>
          <table:table-cell table:style-name="Table3.A1" office:value-type="string">
            <text:p text:style-name="P25">ImageWriter</text:p>
          </table:table-cell>
          <table:table-cell table:style-name="Table3.A1" office:value-type="string">
            <text:p text:style-name="P25">Print to actual ImageWriter</text:p>
          </table:table-cell>
        </table:table-row>
        <table:table-row>
          <table:table-cell table:style-name="Table3.A1" office:value-type="string">
            <text:p text:style-name="P25">Quicktake</text:p>
          </table:table-cell>
          <table:table-cell table:style-name="Table3.A1" office:value-type="string">
            <text:p text:style-name="P25">Any</text:p>
          </table:table-cell>
          <table:table-cell table:style-name="Table3.A1" office:value-type="string">
            <text:p text:style-name="P25">Quicktake for Apple II</text:p>
          </table:table-cell>
        </table:table-row>
        <table:table-row>
          <table:table-cell table:style-name="Table3.A1" office:value-type="string">
            <text:p text:style-name="P25">Mystery device</text:p>
          </table:table-cell>
          <table:table-cell table:style-name="Table3.A1" office:value-type="string">
            <text:p text:style-name="P25">Any</text:p>
          </table:table-cell>
          <table:table-cell table:style-name="Table3.A1" office:value-type="string">
            <text:p text:style-name="P25">Another serial-connected device (for example, another Apple II for Shufflepuck)</text:p>
          </table:table-cell>
        </table:table-row>
      </table:table>
      <text:p text:style-name="P29"/>
      <text:p text:style-name="P38">This user guide will focus on the CISD’s specificities, and point you towards relevant parts of documentation for more general subjects, like the Raspberry’s surl-server configuration.</text:p>
      <text:h text:style-name="P14" text:outline-level="1"><text:bookmark-start text:name="__RefHeading___Toc193_899895566"/><text:span text:style-name="T6">I</text:span>nitial configuration<text:bookmark-end text:name="__RefHeading___Toc193_899895566"/></text:h>
      <text:h text:style-name="P17" text:outline-level="2"><text:bookmark-start text:name="__RefHeading___Toc195_899895566"/>Requirements<text:bookmark-end text:name="__RefHeading___Toc195_899895566"/></text:h>
      <text:p text:style-name="P31">The CISD uses straight DIN-5 cables (MIDI cables) to connect to the computer. It can be connected to an Apple //c this way.</text:p>
      <text:p text:style-name="P31">Adapters are available to connect the other Apple II models:</text:p>
      <text:list text:style-name="L7">
        <text:list-item>
          <text:p text:style-name="P32">DIN-5 to DB-25 for Apple II computers with Super Serial Cards</text:p>
        </text:list-item>
        <text:list-item>
          <text:p text:style-name="P32">DIN-5 to Mini-DIN-8 for Apple IIgs and //c+</text:p>
        </text:list-item>
      </text:list>
      <text:p text:style-name="P33"><text:span text:style-name="T6">Connecting the Quicktake is done with a Mini-DIN-8 null-modem cable, the same as Apple’s </text:span>590-0552-A <text:span text:style-name="T6">cable. </text:span></text:p>
      <text:p text:style-name="P33"><text:span text:style-name="T6">Connecting an ImageWriter II is done with the same Mini-DIN-8 (</text:span>590-0552-A<text:span text:style-name="T6">) cable. Connecting an ImageWriter I is the same, plus a Mini-DIN-8 to DB-25 adapter.</text:span></text:p>
      <text:p text:style-name="P31">Connecting the “Mystery device” is also done using a DIN-5 cable and optionally an adapter. </text:p>
      <text:h text:style-name="Heading_20_2" text:outline-level="2"><text:bookmark-start text:name="__RefHeading___Toc2092_1038169196"/>Assembly<text:bookmark-end text:name="__RefHeading___Toc2092_1038169196"/></text:h>
      <text:p text:style-name="P34">The CISD requires assembly: to use the surl-server proxy, you will have to add your Rasperry Pi (4 or 5). Note that the Raspberry Pi 3 is not compatible with the CISD, as it doesn’t provide enough UARTs.</text:p>
      <text:p text:style-name="P34">For connectivity, you will either need to configure your Raspberry Pi’s Wifi to connect to your access point <text:span text:style-name="T8">before assembly</text:span>, or route an Ethernet cable from the Pi to the outside of the enclosure.</text:p>
      <text:p text:style-name="P35">The assembly is documented on my blog and in video format:</text:p>
      <text:list text:style-name="L8">
        <text:list-item>
          <text:p text:style-name="P36"><text:a xlink:type="simple" xlink:href="https://www.colino.net/wordpress/archives/2026/06/19/assembling-the-cisd-colins-integrated-serial-device/" text:style-name="Internet_20_link" text:visited-style-name="Visited_20_Internet_20_Link">https://www.colino.net/wordpress/archives/2026/06/19/assembling-the-cisd-colins-integrated-serial-device/</text:a></text:p>
        </text:list-item>
        <text:list-item>
          <text:p text:style-name="P36"><text:a xlink:type="simple" xlink:href="https://makertube.net/w/3126M6Etfj8gEXP1TqCbvs" text:style-name="Internet_20_link" text:visited-style-name="Visited_20_Internet_20_Link">https://makertube.net/w/3126M6Etfj8gEXP1TqCbvs</text:a></text:p>
        </text:list-item>
      </text:list>
      <text:p text:style-name="P35"/>
      <text:h text:style-name="P18" text:outline-level="2"><text:bookmark-start text:name="__RefHeading___Toc2094_1038169196"/>8-bits/16-bits switch<text:bookmark-end text:name="__RefHeading___Toc2094_1038169196"/></text:h>
      <text:p text:style-name="P37">On the left side of the CISD is a slide switch. It is used to enable or disable the Quicktake DTR hack. You might already be aware that the <text:soft-page-break/>Quicktake 100 and 150 cameras only talk to the computer they are connected to once the computer disables DTR (Data Terminal Ready). This poses a problem on all 8-bits Apple II computers (//c, //c+, IIe), which are equipped with an ACIA 6551 serial chip: this chip turns off when DTR is deasserted. That means that in order to use a Quicktake with those computers, a special Y cable has to be made<text:note text:id="ftn0" text:note-class="footnote"><text:note-citation>1</text:note-citation><text:note-body><text:p text:style-name="Footnote">https://www.colino.net/wordpress/quicktake-for-apple-ii/#serial-cable-instructions</text:p></text:note-body></text:note>, routing the RS232 RX and TX signals on the Modem port, and the DTR signal on the Printer port. This is not necessary with the IIgs computer, which has a more capable serial chip.</text:p>
      <text:p text:style-name="P37">Position the switch towards the front of the CISD for 8-bits computers, and towards the back for 16-bits computers.</text:p>
      <text:h text:style-name="P15" text:outline-level="1"><text:bookmark-start text:name="__RefHeading___Toc2096_1038169196"/>Usage<text:bookmark-end text:name="__RefHeading___Toc2096_1038169196"/></text:h>
      <text:h text:style-name="P19" text:outline-level="2">Modem port options</text:h>
      <text:p text:style-name="P39">Select “Proxy main” on the left buttons block when you want to use internet programs such as Mastodon for Apple II, Wozamp, etc. Also select “Proxy aux” on the right buttons block when you want to stream video. </text:p>
      <text:p text:style-name="P39">Select “Quicktake” on the left buttons block to connect and get pictures from your camera. </text:p>
      <text:p text:style-name="P39">Select “Mystery device” to connect your Apple II to another device – for example, another Apple II.</text:p>
      <text:h text:style-name="P19" text:outline-level="2">Printer port options</text:h>
      <text:p text:style-name="P39">Select “Proxy aux” on the right buttons block to print to surl-server’s virtual ImageWriter (and when you want to stream video).</text:p>
      <text:p text:style-name="P39">Select “ImageWriter” on the right buttons block to print to a physical ImageWriter I or II.</text:p>
      <text:p text:style-name="P39"/>
      <text:h text:style-name="P16" text:outline-level="1">Surl-server configuration</text:h>
      <text:h text:style-name="Heading_20_2" text:outline-level="2">Serial ports</text:h>
      <text:p text:style-name="P40">Starting with v25.0.3, the surl-server default serial ports configuration is geared towards the CISD’s wiring, and nothing needs to be changed from the default. If you are already using surl-server, ssh to your Pi (ssh <text:a xlink:type="simple" xlink:href="mailto:pi@surl-server.local" text:style-name="Internet_20_link" text:visited-style-name="Visited_20_Internet_20_Link">pi@surl-server.local</text:a> – password is “raspberry”) and update surl-server to the latest version:</text:p>
      <text:p text:style-name="P21"><text:tab/><text:span text:style-name="T10">sudo apt update &amp;&amp; sudo apt install surl-server</text:span></text:p>
      <text:p text:style-name="P21"/>
      <text:p text:style-name="P41">Enable the relevant UARTs <text:span text:style-name="T9">and GPIOs</text:span> in /boot/firmware/config.txt:</text:p>
      <text:p text:style-name="P21"><text:tab/>[all]</text:p>
      <text:p text:style-name="P21"><text:tab/>dtoverlay=gpio-shutdown</text:p>
      <text:p text:style-name="P21"><text:tab/>dtoverlay=gpio-fan,gpiopin=12,temp=5<text:span text:style-name="T9">0</text:span>000,hyst=5000</text:p>
      <text:p text:style-name="P21"><text:tab/>[<text:span text:style-name="T11">pi4</text:span>]</text:p>
      <text:p text:style-name="P21"><text:tab/>enable_uart=1</text:p>
      <text:p text:style-name="P21"><text:tab/>dtoverlay=uart2</text:p>
      <text:p text:style-name="P21"><text:tab/>dtoverlay=uart3</text:p>
      <text:p text:style-name="P21"><text:tab/>[<text:span text:style-name="T11">pi5</text:span>]</text:p>
      <text:p text:style-name="P21"><text:tab/>enable_uart=1</text:p>
      <text:p text:style-name="P21"><text:tab/>dtoverlay=uart<text:span text:style-name="T11">1-pi5</text:span></text:p>
      <text:p text:style-name="P21"><text:tab/>dtoverlay=uart<text:span text:style-name="T11">2-pi5</text:span></text:p>
      <text:p text:style-name="P21"/>
      <text:p text:style-name="P41">Delete the existing surl-server configuration file:</text:p>
      <text:p text:style-name="P21"><text:tab/><text:span text:style-name="T10">rm /etc/a2tools/tty.conf</text:span></text:p>
      <text:p text:style-name="P21"/>
      <text:p text:style-name="P41">And finally, reboot:</text:p>
      <text:p text:style-name="P21"><text:tab/><text:span text:style-name="T10">sudo reboot</text:span></text:p>
      <text:p text:style-name="P21"/>
      <text:p text:style-name="P41"><text:span text:style-name="T9">The virtual printer will, by default, output files to its FTP server on </text:span><text:a xlink:type="simple" xlink:href="ftp://surl-server.local/prints/" text:style-name="Internet_20_link" text:visited-style-name="Visited_20_Internet_20_Link"><text:span text:style-name="T9">ftp://surl-server.local/prints/</text:span></text:a><text:span text:style-name="T9">. It can also automatically print these files to a network printer.</text:span></text:p>
      <text:h text:style-name="P20" text:outline-level="2">More information</text:h>
      <text:p text:style-name="P40">For more details on surl-server’s configuration, please read surl-server’s documentation at <text:a xlink:type="simple" xlink:href="https://www.colino.net/wordpress/surl-server-a-serial-proxy-for-8bit-computers/" text:style-name="Internet_20_link" text:visited-style-name="Visited_20_Internet_20_Link">https://www.colino.net/wordpress/surl-server-a-serial-proxy-for-8bit-computers/</text:a>.</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3</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7-02T13:30:22.035763209</dc:date>
    <meta:editing-duration>P2DT9H1M9S</meta:editing-duration>
    <meta:editing-cycles>237</meta:editing-cycles>
    <meta:generator>LibreOffice/24.2.7.2$Linux_X86_64 LibreOffice_project/420$Build-2</meta:generator>
    <meta:print-date>2023-09-21T10:14:18.194577295</meta:print-date>
    <meta:document-statistic meta:table-count="1" meta:image-count="0" meta:object-count="0" meta:page-count="7" meta:paragraph-count="101" meta:word-count="873" meta:character-count="5643" meta:non-whitespace-character-count="4857"/>
  </office:meta>
</office:document-meta>
</file>