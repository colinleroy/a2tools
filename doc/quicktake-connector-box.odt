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F000002054EBD5246.png" manifest:media-type="image/png"/>
  <manifest:file-entry manifest:full-path="Pictures/100000010000057200000347E01864FA.png" manifest:media-type="image/png"/>
  <manifest:file-entry manifest:full-path="Pictures/100000010000007B0000007B23C32D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1" style:family="table-row">
      <style:table-row-properties style:min-row-height="1.2292in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Latin Modern Mono1"/>
    </style:style>
    <style:style style:name="P6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172168e" officeooo:paragraph-rsid="0172168e"/>
    </style:style>
    <style:style style:name="P8" style:family="paragraph" style:parent-style-name="Text_20_body">
      <style:text-properties officeooo:rsid="01863516" officeooo:paragraph-rsid="01863516"/>
    </style:style>
    <style:style style:name="P9" style:family="paragraph" style:parent-style-name="Text_20_body">
      <style:text-properties officeooo:paragraph-rsid="01863516"/>
    </style:style>
    <style:style style:name="P10" style:family="paragraph" style:parent-style-name="Text_20_body">
      <style:text-properties officeooo:rsid="0187afc2" officeooo:paragraph-rsid="0187afc2"/>
    </style:style>
    <style:style style:name="P11" style:family="paragraph" style:parent-style-name="Text_20_body">
      <style:text-properties fo:font-weight="normal" officeooo:rsid="017ff455" officeooo:paragraph-rsid="018457ec" style:font-weight-asian="normal" style:font-weight-complex="normal"/>
    </style:style>
    <style:style style:name="P12" style:family="paragraph" style:parent-style-name="Text_20_body">
      <style:text-properties officeooo:rsid="010c9781" officeooo:paragraph-rsid="01863516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4" style:family="paragraph" style:parent-style-name="Heading_20_2">
      <style:paragraph-properties fo:break-before="page"/>
      <style:text-properties officeooo:rsid="01863516" officeooo:paragraph-rsid="01863516"/>
    </style:style>
    <style:style style:name="P15" style:family="paragraph" style:parent-style-name="Heading_20_2">
      <style:text-properties officeooo:rsid="01863516" officeooo:paragraph-rsid="01863516"/>
    </style:style>
    <style:style style:name="P16" style:family="paragraph" style:parent-style-name="Heading_20_2">
      <style:text-properties officeooo:paragraph-rsid="01863516"/>
    </style:style>
    <style:style style:name="P17" style:family="paragraph" style:parent-style-name="Heading_20_2">
      <style:text-properties officeooo:rsid="0187afc2" officeooo:paragraph-rsid="0187afc2"/>
    </style:style>
    <style:style style:name="P18" style:family="paragraph" style:parent-style-name="Text_20_body" style:list-style-name="L1">
      <style:text-properties fo:font-weight="normal" officeooo:rsid="017ff455" officeooo:paragraph-rsid="018457ec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17ff455" officeooo:paragraph-rsid="018a8ce8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18457ec" officeooo:paragraph-rsid="018457ec" style:font-weight-asian="normal" style:font-weight-complex="normal"/>
    </style:style>
    <style:style style:name="P21" style:family="paragraph" style:parent-style-name="Text_20_body" style:list-style-name="L2">
      <style:text-properties officeooo:paragraph-rsid="01863516"/>
    </style:style>
    <style:style style:name="P22" style:family="paragraph" style:parent-style-name="Text_20_body" style:list-style-name="L2">
      <style:text-properties officeooo:rsid="01863516" officeooo:paragraph-rsid="01863516"/>
    </style:style>
    <style:style style:name="P23" style:family="paragraph" style:parent-style-name="Text_20_body" style:list-style-name="L3">
      <style:text-properties officeooo:paragraph-rsid="018635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840aea" style:font-weight-asian="normal" style:font-weight-complex="normal"/>
    </style:style>
    <style:style style:name="T3" style:family="text">
      <style:text-properties officeooo:rsid="01840aea"/>
    </style:style>
    <style:style style:name="T4" style:family="text">
      <style:text-properties officeooo:rsid="018457ec"/>
    </style:style>
    <style:style style:name="T5" style:family="text">
      <style:text-properties style:font-name="Latin Modern Mono" fo:font-weight="normal" style:font-weight-asian="normal" style:font-weight-complex="normal"/>
    </style:style>
    <style:style style:name="T6" style:family="text">
      <style:text-properties style:font-name="Latin Modern Mono" fo:font-weight="normal" officeooo:rsid="01840aea" style:font-weight-asian="normal" style:font-weight-complex="normal"/>
    </style:style>
    <style:style style:name="T7" style:family="text">
      <style:text-properties officeooo:rsid="01863516"/>
    </style:style>
    <style:style style:name="T8" style:family="text">
      <style:text-properties officeooo:rsid="010c9781"/>
    </style:style>
    <style:style style:name="T9" style:family="text">
      <style:text-properties officeooo:rsid="018770e9"/>
    </style:style>
    <style:style style:name="T10" style:family="text">
      <style:text-properties officeooo:rsid="0189984b"/>
    </style:style>
    <style:style style:name="T11" style:family="text">
      <style:text-properties officeooo:rsid="018a8ce8"/>
    </style:style>
    <style:style style:name="T12" style:family="text">
      <style:text-properties officeooo:rsid="018b8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Quicktake Connector Box</text:span> for Apple II</text:p>
      <text:p text:style-name="P3"/>
      <text:p text:style-name="P4">Quickstart</text:p>
      <text:p text:style-name="P2"/>
      <text:p text:style-name="P7"><text:span text:style-name="T5">Thank you for getting </text:span><text:span text:style-name="T6">the Quicktake Connector box </text:span><text:span text:style-name="T5">! I hope you will like it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Image1" text:anchor-type="char" svg:width="1.2354in" svg:height="1.2354in" draw:z-index="0"><draw:image xlink:href="Pictures/100000010000007B0000007B23C32D9C.png" xlink:type="simple" xlink:show="embed" xlink:actuate="onLoad" draw:mime-type="image/png"/></draw:frame></text:p>
          </table:table-cell>
          <table:table-cell table:style-name="Table1.A1" office:value-type="string">
            <text:p text:style-name="P6">The <text:span text:style-name="T3">Quicktake for Apple II </text:span>User Manual <text:span text:style-name="T1">is available at </text:span><text:a xlink:type="simple" xlink:href="https://www.colino.net/wordpress/wp-content/quicktake-user-guide.pdf" text:style-name="Internet_20_link" text:visited-style-name="Visited_20_Internet_20_Link"><text:span text:style-name="T1">https://www.colino.net/wordpress/wp-content/</text:span><text:span text:style-name="T2">quicktake</text:span><text:span text:style-name="T1">-user-</text:span><text:span text:style-name="T2">guide</text:span><text:span text:style-name="T1">.pdf</text:span></text:a></text:p>
          </table:table-cell>
        </table:table-row>
      </table:table>
      <text:p text:style-name="P11">Here are the most relevant parts <text:span text:style-name="T10">concerning setup</text:span>: </text:p>
      <text:h text:style-name="Heading_20_2" text:outline-level="2">Installation</text:h>
      <text:list text:style-name="L1">
        <text:list-item>
          <text:p text:style-name="P18"><draw:frame draw:style-name="fr2" draw:name="Image8" text:anchor-type="paragraph" svg:width="6.6953in" style:rel-width="100%" svg:height="4.0291in" style:rel-height="scale" draw:z-index="1"><draw:image xlink:href="Pictures/100000010000057200000347E01864FA.png" xlink:type="simple" xlink:show="embed" xlink:actuate="onLoad" draw:mime-type="image/png"/></draw:frame><text:span text:style-name="T4">Connect the Apple II Printer Port cable from the box to your computer (Printer port on //c or //c+; SSC in Slot 1 on IIe, </text:span><text:span text:style-name="T11">with DB25 adapter</text:span><text:span text:style-name="T4">)</text:span></text:p>
        </text:list-item>
        <text:list-item>
          <text:p text:style-name="P19"><text:span text:style-name="T4">Connect the Apple II Modem Port cable from the box to your computer (Modem port on //c or //c+; SSC in Slot 2 on IIe, </text:span><text:span text:style-name="T11">with DB25 adapter</text:span><text:span text:style-name="T4">)</text:span></text:p>
        </text:list-item>
        <text:list-item>
          <text:p text:style-name="P20">Connect the Quicktake to the Quicktake connector on the Box</text:p>
        </text:list-item>
        <text:list-item>
          <text:p text:style-name="P20">Optionally, connect your ImageWriter to the ImageWriter connector on the Box.</text:p>
        </text:list-item>
      </text:list>
      <text:h text:style-name="P14" text:outline-level="2">Usage</text:h>
      <text:p text:style-name="P8">Turn your Quicktake camera on by opening the lens cover. It should make a little noise, and the LCD should show a rotating rectang<text:span text:style-name="T12">l</text:span>e.</text:p>
      <text:p text:style-name="P8">Start the Quicktake for Apple II program on your computer. It should detect the Quicktake at start.</text:p>
      <text:p text:style-name="P8">You can now get pictures from the camera to your computer using the ‘G’ key, and after they are decompressed and displayed on screen, you can save and print them.</text:p>
      <text:h text:style-name="P15" text:outline-level="2">Note for the Super Serial Cards setup on the Apple IIe</text:h>
      <text:p text:style-name="P8">By default, the Quicktake program and connector box need both cards setup in Modem mode, with interrupts on:</text:p>
      <text:list text:style-name="L2">
        <text:list-item>
          <text:p text:style-name="P22">Jumper block pointing towards Modem</text:p>
        </text:list-item>
        <text:list-item>
          <text:p text:style-name="P21">Modem mode: SW1-5 and SW1-6 should be ON (closed)</text:p>
        </text:list-item>
        <text:list-item>
          <text:p text:style-name="P21">Interrupts: SW2-6 should be ON (closed)</text:p>
        </text:list-item>
        <text:list-item>
          <text:p text:style-name="P21">RS232C signals: SW1-7 should be ON (closed) <draw:frame draw:style-name="fr1" draw:name="Image2" text:anchor-type="char" svg:x="4.0984in" svg:y="-0.0854in" svg:width="3.1563in" svg:height="2.4319in" draw:z-index="2"><draw:image xlink:href="Pictures/100000010000029F000002054EBD5246.png" xlink:type="simple" xlink:show="embed" xlink:actuate="onLoad" draw:mime-type="image/png"/></draw:frame>and SW2-7 OFF (open)</text:p>
        </text:list-item>
      </text:list>
      <text:p text:style-name="P8">If your Super Serial Card in slot 1 is set to printer mode (Jumper block pointing towards Terminal, SW1-5 OFF, SW1-6 ON), you can open the Printer port’s DIN-5 to DB-25 adapter enclosure, and turn both jumper blocks <text:span text:style-name="T9">(pictured right) </text:span>90°.</text:p>
      <text:h text:style-name="P16" text:outline-level="2"><text:bookmark-start text:name="__RefHeading___Toc1897_407892232"/><text:span text:style-name="T7">Note for the </text:span>ImageWriter configuration<text:bookmark-end text:name="__RefHeading___Toc1897_407892232"/></text:h>
      <text:p text:style-name="P9">The ImageWriter should be configured for 9600bps, software flow control (XON/XOFF):</text:p>
      <text:list text:style-name="L3">
        <text:list-item>
          <text:p text:style-name="P23">9600 bps: SW2-1 and SW2-2 <text:span text:style-name="T8">ON</text:span> (closed)</text:p>
        </text:list-item>
        <text:list-item>
          <text:p text:style-name="P23">XON/XOFF: SW2-3 O<text:span text:style-name="T8">N</text:span> (closed)</text:p>
        </text:list-item>
      </text:list>
      <text:p text:style-name="P12">On the ImageWriter I, also set SW1-5 OFF (open).</text:p>
      <text:h text:style-name="P17" text:outline-level="2">Support</text:h>
      <text:p text:style-name="P10">I’m available at <text:a xlink:type="simple" xlink:href="mailto:colin@colino.net" text:style-name="Internet_20_link" text:visited-style-name="Visited_20_Internet_20_Link">colin@colino.net</text:a> for support if needed. Have fun! :-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5-23T22:26:28.510564488</dc:date>
    <meta:editing-duration>P1DT21H10M28S</meta:editing-duration>
    <meta:editing-cycles>346</meta:editing-cycles>
    <meta:generator>LibreOffice/24.2.7.2$Linux_X86_64 LibreOffice_project/420$Build-2</meta:generator>
    <meta:print-date>2026-05-20T11:15:12.641107353</meta:print-date>
    <meta:document-statistic meta:table-count="1" meta:image-count="3" meta:object-count="0" meta:page-count="2" meta:paragraph-count="31" meta:word-count="353" meta:character-count="2028" meta:non-whitespace-character-count="1715"/>
  </office:meta>
</office:document-meta>
</file>