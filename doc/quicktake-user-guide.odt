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000000180BB133A48.png" manifest:media-type="image/png"/>
  <manifest:file-entry manifest:full-path="Pictures/1000000000000230000001802E2503E5.png" manifest:media-type="image/png"/>
  <manifest:file-entry manifest:full-path="Pictures/100000010000022E000000E0CEFE2489.png" manifest:media-type="image/png"/>
  <manifest:file-entry manifest:full-path="Pictures/100000010000022D0000017D472ADE61.png" manifest:media-type="image/png"/>
  <manifest:file-entry manifest:full-path="Pictures/100000010000022E0000013C665EB110.png" manifest:media-type="image/png"/>
  <manifest:file-entry manifest:full-path="Pictures/100000010000022F000000BB98C4A68F.png" manifest:media-type="image/png"/>
  <manifest:file-entry manifest:full-path="Pictures/100000010000022D0000017A9F5D19AF.png" manifest:media-type="image/png"/>
  <manifest:file-entry manifest:full-path="Pictures/100000010000057200000347E01864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6736in" style:rel-column-width="16383*"/>
    </style:style>
    <style:style style:name="Table4.D" style:family="table-column">
      <style:table-column-properties style:column-width="1.6743in" style:rel-column-width="16386*"/>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10" style:family="table">
      <style:table-properties style:width="6.6951in" table:align="margins"/>
    </style:style>
    <style:style style:name="Table10.A" style:family="table-column">
      <style:table-column-properties style:column-width="1.6736in" style:rel-column-width="16383*"/>
    </style:style>
    <style:style style:name="Table10.D" style:family="table-column">
      <style:table-column-properties style:column-width="1.6743in" style:rel-column-width="16386*"/>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style>
    <style:style style:name="Table2.A" style:family="table-column">
      <style:table-column-properties style:column-width="1.6736in" style:rel-column-width="16383*"/>
    </style:style>
    <style:style style:name="Table2.D" style:family="table-column">
      <style:table-column-properties style:column-width="1.674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text-properties style:font-name="Latin Modern Mono" officeooo:rsid="00108780" officeooo:paragraph-rsid="00dd6a7f"/>
    </style:style>
    <style:style style:name="P9" style:family="paragraph" style:parent-style-name="Standard">
      <style:text-properties style:font-name="Latin Modern Mono" officeooo:rsid="0036bb8a" officeooo:paragraph-rsid="00dd6a7f"/>
    </style:style>
    <style:style style:name="P10" style:family="paragraph" style:parent-style-name="Text_20_body">
      <style:text-properties officeooo:rsid="0049279c" officeooo:paragraph-rsid="0049279c"/>
    </style:style>
    <style:style style:name="P11" style:family="paragraph" style:parent-style-name="Text_20_body">
      <style:text-properties officeooo:paragraph-rsid="0059e122"/>
    </style:style>
    <style:style style:name="P12" style:family="paragraph" style:parent-style-name="Standard">
      <style:text-properties officeooo:paragraph-rsid="001acb08"/>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Figure_20_Index_20_1">
      <style:paragraph-properties>
        <style:tab-stops>
          <style:tab-stop style:position="5.7701in" style:type="right" style:leader-style="dotted" style:leader-text="."/>
        </style:tab-stops>
      </style:paragraph-properties>
    </style:style>
    <style:style style:name="P16" style:family="paragraph" style:parent-style-name="Table_20_index_20_1">
      <style:paragraph-properties>
        <style:tab-stops>
          <style:tab-stop style:position="5.7701in" style:type="right" style:leader-style="dotted" style:leader-text="."/>
        </style:tab-stops>
      </style:paragraph-properties>
    </style:style>
    <style:style style:name="P17" style:family="paragraph" style:parent-style-name="Text_20_body">
      <style:text-properties officeooo:paragraph-rsid="00dd6a7f"/>
    </style:style>
    <style:style style:name="P18" style:family="paragraph" style:parent-style-name="Text_20_body">
      <style:text-properties officeooo:rsid="00dd6a7f" officeooo:paragraph-rsid="00dd6a7f"/>
    </style:style>
    <style:style style:name="P19" style:family="paragraph" style:parent-style-name="Standard">
      <style:text-properties style:font-name="Latin Modern Mono1" fo:font-size="12pt" officeooo:rsid="00bb93c2" officeooo:paragraph-rsid="00bb93c2" style:font-size-asian="12pt" style:font-name-complex="Lohit Devanagari" style:font-size-complex="12pt"/>
    </style:style>
    <style:style style:name="P20" style:family="paragraph" style:parent-style-name="Table_20_Contents">
      <style:text-properties style:font-name="Latin Modern Mono1" fo:font-size="12pt" officeooo:rsid="00bb93c2" officeooo:paragraph-rsid="00bb93c2" style:font-size-asian="12pt" style:font-name-complex="Lohit Devanagari" style:font-size-complex="12pt"/>
    </style:style>
    <style:style style:name="P21" style:family="paragraph" style:parent-style-name="Table_20_Contents">
      <style:text-properties style:font-name="Latin Modern Mono1" fo:font-size="12pt" style:font-size-asian="12pt" style:font-name-complex="Lohit Devanagari" style:font-size-complex="12pt"/>
    </style:style>
    <style:style style:name="P22" style:family="paragraph" style:parent-style-name="Table_20_Contents">
      <style:text-properties style:font-name="Latin Modern Mono1" fo:font-size="12pt" officeooo:rsid="00bb681d" officeooo:paragraph-rsid="00bb681d" style:font-size-asian="12pt" style:font-name-complex="Lohit Devanagari" style:font-size-complex="12pt"/>
    </style:style>
    <style:style style:name="P23" style:family="paragraph" style:parent-style-name="Table_20_Contents">
      <style:text-properties style:font-name="Latin Modern Mono1" fo:font-size="12pt" officeooo:rsid="00bb681d" officeooo:paragraph-rsid="00bb93c2" style:font-size-asian="12pt" style:font-name-complex="Lohit Devanagari" style:font-size-complex="12pt"/>
    </style:style>
    <style:style style:name="P24" style:family="paragraph" style:parent-style-name="Table_20_Contents">
      <style:text-properties style:font-name="Latin Modern Mono1" fo:font-size="12pt" officeooo:paragraph-rsid="00bb93c2" style:font-size-asian="12pt" style:font-name-complex="Lohit Devanagari" style:font-size-complex="12pt"/>
    </style:style>
    <style:style style:name="P25" style:family="paragraph" style:parent-style-name="Table_20_Contents">
      <style:text-properties style:font-name="Latin Modern Mono1" fo:font-size="12pt" officeooo:rsid="00e26d99" officeooo:paragraph-rsid="00e26d99" style:font-size-asian="12pt" style:font-name-complex="Lohit Devanagari" style:font-size-complex="12pt"/>
    </style:style>
    <style:style style:name="P26" style:family="paragraph" style:parent-style-name="Table">
      <style:text-properties officeooo:rsid="00bed9d9" officeooo:paragraph-rsid="00bed9d9"/>
    </style:style>
    <style:style style:name="P27" style:family="paragraph" style:parent-style-name="Text_20_body">
      <style:text-properties officeooo:rsid="00ceb949" officeooo:paragraph-rsid="00ceb949"/>
    </style:style>
    <style:style style:name="P28" style:family="paragraph" style:parent-style-name="Text_20_body">
      <style:text-properties officeooo:rsid="0059e122" officeooo:paragraph-rsid="0059e122"/>
    </style:style>
    <style:style style:name="P29" style:family="paragraph" style:parent-style-name="Text_20_body">
      <style:text-properties officeooo:paragraph-rsid="00dae2d7"/>
    </style:style>
    <style:style style:name="P30" style:family="paragraph" style:parent-style-name="Text_20_body">
      <style:text-properties officeooo:rsid="00eea180" officeooo:paragraph-rsid="00eea180"/>
    </style:style>
    <style:style style:name="P31" style:family="paragraph" style:parent-style-name="Contents_20_1">
      <style:paragraph-properties>
        <style:tab-stops>
          <style:tab-stop style:position="5.7693in" style:type="right" style:leader-style="dotted" style:leader-text="."/>
        </style:tab-stops>
      </style:paragraph-properties>
    </style:style>
    <style:style style:name="P32" style:family="paragraph" style:parent-style-name="Contents_20_2">
      <style:paragraph-properties>
        <style:tab-stops>
          <style:tab-stop style:position="5.5728in" style:type="right" style:leader-style="dotted" style:leader-text="."/>
        </style:tab-stops>
      </style:paragraph-properties>
    </style:style>
    <style:style style:name="P33" style:family="paragraph" style:parent-style-name="Text_20_body">
      <style:text-properties officeooo:rsid="00f1f68e" officeooo:paragraph-rsid="00f1f68e"/>
    </style:style>
    <style:style style:name="P34" style:family="paragraph" style:parent-style-name="Text_20_body">
      <style:text-properties officeooo:paragraph-rsid="00f2ddc8"/>
    </style:style>
    <style:style style:name="P35" style:family="paragraph" style:parent-style-name="Text_20_body">
      <style:text-properties officeooo:rsid="00f2ddc8" officeooo:paragraph-rsid="00f2ddc8"/>
    </style:style>
    <style:style style:name="P36" style:family="paragraph" style:parent-style-name="Contents_20_1">
      <style:paragraph-properties>
        <style:tab-stops>
          <style:tab-stop style:position="5.7693in" style:type="right" style:leader-style="dotted" style:leader-text="."/>
        </style:tab-stops>
      </style:paragraph-properties>
    </style:style>
    <style:style style:name="P37" style:family="paragraph" style:parent-style-name="Contents_20_2">
      <style:paragraph-properties>
        <style:tab-stops>
          <style:tab-stop style:position="5.5728in" style:type="right" style:leader-style="dotted" style:leader-text="."/>
        </style:tab-stops>
      </style:paragraph-properties>
    </style:style>
    <style:style style:name="P38" style:family="paragraph" style:parent-style-name="Contents_20_Heading" style:master-page-name="Forepages">
      <style:paragraph-properties style:page-number="auto"/>
    </style:style>
    <style:style style:name="P39" style:family="paragraph" style:parent-style-name="Figure_20_Index_20_1">
      <style:paragraph-properties>
        <style:tab-stops>
          <style:tab-stop style:position="5.7693in" style:type="right" style:leader-style="dotted" style:leader-text="."/>
        </style:tab-stops>
      </style:paragraph-properties>
    </style:style>
    <style:style style:name="P40" style:family="paragraph" style:parent-style-name="Footnote">
      <style:paragraph-properties fo:text-indent="0in" style:auto-text-indent="false"/>
      <style:text-properties officeooo:rsid="01095541" officeooo:paragraph-rsid="01095541"/>
    </style:style>
    <style:style style:name="P41" style:family="paragraph" style:parent-style-name="Heading_20_1">
      <style:text-properties officeooo:rsid="0074f29c" officeooo:paragraph-rsid="001c9030"/>
    </style:style>
    <style:style style:name="P42" style:family="paragraph" style:parent-style-name="Heading_20_1" style:master-page-name="Standard">
      <style:paragraph-properties style:page-number="auto"/>
      <style:text-properties officeooo:rsid="0074f29c" officeooo:paragraph-rsid="0074f29c"/>
    </style:style>
    <style:style style:name="P43" style:family="paragraph" style:parent-style-name="Heading_20_1">
      <style:paragraph-properties fo:break-before="page"/>
      <style:text-properties officeooo:paragraph-rsid="001c9030"/>
    </style:style>
    <style:style style:name="P44" style:family="paragraph" style:parent-style-name="Heading_20_1" style:list-style-name=""/>
    <style:style style:name="P45" style:family="paragraph" style:parent-style-name="Heading_20_1" style:list-style-name="">
      <style:text-properties officeooo:rsid="00c048a7" officeooo:paragraph-rsid="00c048a7"/>
    </style:style>
    <style:style style:name="P46" style:family="paragraph" style:parent-style-name="Heading_20_1" style:list-style-name="">
      <style:paragraph-properties fo:break-before="page"/>
      <style:text-properties officeooo:rsid="00c048a7" officeooo:paragraph-rsid="00c048a7"/>
    </style:style>
    <style:style style:name="P47" style:family="paragraph" style:parent-style-name="Heading_20_1">
      <style:paragraph-properties fo:break-before="page"/>
    </style:style>
    <style:style style:name="P48" style:family="paragraph" style:parent-style-name="Heading_20_2">
      <style:text-properties officeooo:rsid="00dd6a7f" officeooo:paragraph-rsid="00dd6a7f"/>
    </style:style>
    <style:style style:name="P49" style:family="paragraph" style:parent-style-name="Heading_20_2">
      <style:text-properties officeooo:paragraph-rsid="00dd6a7f"/>
    </style:style>
    <style:style style:name="P50" style:family="paragraph" style:parent-style-name="Heading_20_2">
      <style:text-properties officeooo:paragraph-rsid="00bb93c2"/>
    </style:style>
    <style:style style:name="P51" style:family="paragraph" style:parent-style-name="Heading_20_2">
      <style:text-properties officeooo:rsid="00c21267" officeooo:paragraph-rsid="00c21267"/>
    </style:style>
    <style:style style:name="P52" style:family="paragraph" style:parent-style-name="Heading_20_2">
      <style:paragraph-properties fo:break-before="page"/>
    </style:style>
    <style:style style:name="P53" style:family="paragraph" style:parent-style-name="Heading_20_2">
      <style:text-properties officeooo:paragraph-rsid="00fc4639"/>
    </style:style>
    <style:style style:name="P54"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55" style:family="paragraph" style:parent-style-name="Standard">
      <style:paragraph-properties fo:text-align="end" style:justify-single-word="false"/>
      <style:text-properties style:font-name="Latin Modern Mono" fo:font-weight="normal" officeooo:rsid="01058066" officeooo:paragraph-rsid="01058066" style:font-weight-asian="normal" style:font-weight-complex="normal"/>
    </style:style>
    <style:style style:name="P56" style:family="paragraph" style:parent-style-name="Standard">
      <style:text-properties style:font-name="Latin Modern Mono1" fo:font-size="12pt" officeooo:rsid="00bb681d" officeooo:paragraph-rsid="00f9ceb7" style:font-size-asian="12pt" style:font-name-complex="Lohit Devanagari" style:font-size-complex="12pt"/>
    </style:style>
    <style:style style:name="P57" style:family="paragraph" style:parent-style-name="Table">
      <style:paragraph-properties fo:keep-with-next="always"/>
    </style:style>
    <style:style style:name="P58" style:family="paragraph" style:parent-style-name="Table_20_Contents">
      <style:text-properties style:font-name="Latin Modern Mono1" fo:font-size="12pt" officeooo:rsid="00bb681d" officeooo:paragraph-rsid="00bb681d" style:font-size-asian="12pt" style:font-name-complex="Lohit Devanagari" style:font-size-complex="12pt"/>
    </style:style>
    <style:style style:name="P59" style:family="paragraph" style:parent-style-name="Table_20_Contents">
      <style:text-properties style:font-name="Latin Modern Mono1" fo:font-size="12pt" officeooo:rsid="00bb681d" officeooo:paragraph-rsid="00f9ceb7" style:font-size-asian="12pt" style:font-name-complex="Lohit Devanagari" style:font-size-complex="12pt"/>
    </style:style>
    <style:style style:name="P60" style:family="paragraph" style:parent-style-name="Table_20_Contents">
      <style:text-properties style:font-name="Latin Modern Mono1" fo:font-size="12pt" officeooo:rsid="00bb93c2" officeooo:paragraph-rsid="00f9ceb7" style:font-size-asian="12pt" style:font-name-complex="Lohit Devanagari" style:font-size-complex="12pt"/>
    </style:style>
    <style:style style:name="P61" style:family="paragraph" style:parent-style-name="Table_20_Contents">
      <style:text-properties style:font-name="Latin Modern Mono1" fo:font-size="12pt" officeooo:paragraph-rsid="00f9ceb7" style:font-size-asian="12pt" style:font-name-complex="Lohit Devanagari" style:font-size-complex="12pt"/>
    </style:style>
    <style:style style:name="P62" style:family="paragraph" style:parent-style-name="Table_20_Contents">
      <style:text-properties style:font-name="Latin Modern Mono1" fo:font-size="12pt" officeooo:rsid="00f9ceb7" officeooo:paragraph-rsid="00f9ceb7" style:font-size-asian="12pt" style:font-name-complex="Lohit Devanagari" style:font-size-complex="12pt"/>
    </style:style>
    <style:style style:name="P63" style:family="paragraph" style:parent-style-name="Table_20_index_20_1">
      <style:paragraph-properties>
        <style:tab-stops>
          <style:tab-stop style:position="5.7693in" style:type="right" style:leader-style="dotted" style:leader-text="."/>
        </style:tab-stops>
      </style:paragraph-properties>
    </style:style>
    <style:style style:name="P64" style:family="paragraph" style:parent-style-name="Text_20_body" style:list-style-name="L1">
      <style:text-properties officeooo:rsid="00dd6a7f" officeooo:paragraph-rsid="00dd6a7f"/>
    </style:style>
    <style:style style:name="P65" style:family="paragraph" style:parent-style-name="Text_20_body" style:list-style-name="L2"/>
    <style:style style:name="P66" style:family="paragraph" style:parent-style-name="Text_20_body" style:list-style-name="">
      <style:text-properties officeooo:rsid="00c3bb77" officeooo:paragraph-rsid="00c3bb77"/>
    </style:style>
    <style:style style:name="P67" style:family="paragraph" style:parent-style-name="Text_20_body" style:list-style-name="L3"/>
    <style:style style:name="P68" style:family="paragraph" style:parent-style-name="Text_20_body">
      <style:text-properties officeooo:paragraph-rsid="00f9ceb7"/>
    </style:style>
    <style:style style:name="P69" style:family="paragraph" style:parent-style-name="Text_20_body">
      <style:text-properties officeooo:paragraph-rsid="00fc4639"/>
    </style:style>
    <style:style style:name="P70" style:family="paragraph" style:parent-style-name="Text_20_body" style:list-style-name="L4">
      <style:text-properties officeooo:paragraph-rsid="00fc4639"/>
    </style:style>
    <style:style style:name="P71" style:family="paragraph" style:parent-style-name="Text_20_body" style:list-style-name="L5">
      <style:text-properties officeooo:paragraph-rsid="00fc4639"/>
    </style:style>
    <style:style style:name="P72" style:family="paragraph" style:parent-style-name="Text_20_body">
      <style:text-properties officeooo:rsid="0049279c" officeooo:paragraph-rsid="0049279c"/>
    </style:style>
    <style:style style:name="P73" style:family="paragraph" style:parent-style-name="Text_20_body">
      <style:text-properties officeooo:rsid="0049279c" officeooo:paragraph-rsid="0101d762"/>
    </style:style>
    <style:style style:name="P74" style:family="paragraph" style:parent-style-name="Text_20_body">
      <style:text-properties officeooo:paragraph-rsid="0049279c"/>
    </style:style>
    <style:style style:name="P75" style:family="paragraph" style:parent-style-name="Text_20_body">
      <style:text-properties officeooo:rsid="00d98f86" officeooo:paragraph-rsid="00d98f86"/>
    </style:style>
    <style:style style:name="P76" style:family="paragraph" style:parent-style-name="Text_20_body">
      <style:text-properties officeooo:rsid="010769ee" officeooo:paragraph-rsid="010769ee"/>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officeooo:rsid="005a7646"/>
    </style:style>
    <style:style style:name="T5" style:family="text">
      <style:text-properties fo:font-size="12pt" officeooo:rsid="005e2a88"/>
    </style:style>
    <style:style style:name="T6" style:family="text">
      <style:text-properties officeooo:rsid="007fb273"/>
    </style:style>
    <style:style style:name="T7" style:family="text">
      <style:text-properties officeooo:rsid="008a01ae"/>
    </style:style>
    <style:style style:name="T8" style:family="text">
      <style:text-properties style:font-name="Latin Modern Mono" fo:font-weight="normal" officeooo:rsid="001acb08" style:font-weight-asian="normal" style:font-weight-complex="normal"/>
    </style:style>
    <style:style style:name="T9" style:family="text">
      <style:text-properties style:font-name="Latin Modern Mono" fo:font-weight="normal" officeooo:rsid="004e1257" style:font-weight-asian="normal" style:font-weight-complex="normal"/>
    </style:style>
    <style:style style:name="T10" style:family="text">
      <style:text-properties officeooo:rsid="00ba2d33"/>
    </style:style>
    <style:style style:name="T11" style:family="text">
      <style:text-properties officeooo:rsid="00bb681d"/>
    </style:style>
    <style:style style:name="T12" style:family="text">
      <style:text-properties officeooo:rsid="00bb93c2"/>
    </style:style>
    <style:style style:name="T13" style:family="text">
      <style:text-properties officeooo:rsid="00bc9e58"/>
    </style:style>
    <style:style style:name="T14" style:family="text">
      <style:text-properties officeooo:rsid="00bde487"/>
    </style:style>
    <style:style style:name="T15" style:family="text">
      <style:text-properties officeooo:rsid="00c21267"/>
    </style:style>
    <style:style style:name="T16" style:family="text">
      <style:text-properties fo:font-weight="bold" style:font-weight-asian="bold" style:font-weight-complex="bold"/>
    </style:style>
    <style:style style:name="T17" style:family="text">
      <style:text-properties fo:font-weight="bold" officeooo:rsid="00c21267" style:font-weight-asian="bold" style:font-weight-complex="bold"/>
    </style:style>
    <style:style style:name="T18" style:family="text">
      <style:text-properties fo:font-weight="bold" officeooo:rsid="00c8969a" style:font-weight-asian="bold" style:font-weight-complex="bold"/>
    </style:style>
    <style:style style:name="T19" style:family="text">
      <style:text-properties officeooo:rsid="00c3bb77"/>
    </style:style>
    <style:style style:name="T20" style:family="text">
      <style:text-properties officeooo:rsid="00c761cb"/>
    </style:style>
    <style:style style:name="T21" style:family="text">
      <style:text-properties officeooo:rsid="00c7a53d"/>
    </style:style>
    <style:style style:name="T22" style:family="text">
      <style:text-properties officeooo:rsid="00c8969a"/>
    </style:style>
    <style:style style:name="T23" style:family="text">
      <style:text-properties officeooo:rsid="00ca143b"/>
    </style:style>
    <style:style style:name="T24" style:family="text">
      <style:text-properties officeooo:rsid="00cbf413"/>
    </style:style>
    <style:style style:name="T25" style:family="text">
      <style:text-properties fo:font-weight="normal" style:font-weight-asian="normal" style:font-weight-complex="normal"/>
    </style:style>
    <style:style style:name="T26" style:family="text">
      <style:text-properties officeooo:rsid="00d98f86"/>
    </style:style>
    <style:style style:name="T27" style:family="text">
      <style:text-properties officeooo:rsid="00dae2d7"/>
    </style:style>
    <style:style style:name="T28" style:family="text">
      <style:text-properties officeooo:rsid="00e818b3"/>
    </style:style>
    <style:style style:name="T29" style:family="text">
      <style:text-properties officeooo:rsid="00e9dee6"/>
    </style:style>
    <style:style style:name="T30" style:family="text">
      <style:text-properties officeooo:rsid="00eacc0e"/>
    </style:style>
    <style:style style:name="T31" style:family="text">
      <style:text-properties officeooo:rsid="00eea180"/>
    </style:style>
    <style:style style:name="T32" style:family="text">
      <style:text-properties officeooo:rsid="00ef46ad"/>
    </style:style>
    <style:style style:name="T33" style:family="text">
      <style:text-properties officeooo:rsid="00f151ff"/>
    </style:style>
    <style:style style:name="T34" style:family="text">
      <style:text-properties officeooo:rsid="00f2ddc8"/>
    </style:style>
    <style:style style:name="T35" style:family="text">
      <style:text-properties officeooo:rsid="00f681bc"/>
    </style:style>
    <style:style style:name="T36" style:family="text">
      <style:text-properties officeooo:rsid="00f83a85"/>
    </style:style>
    <style:style style:name="T37" style:family="text">
      <style:text-properties officeooo:rsid="00f8f37c"/>
    </style:style>
    <style:style style:name="T38" style:family="text">
      <style:text-properties officeooo:rsid="00f9ceb7"/>
    </style:style>
    <style:style style:name="T39" style:family="text">
      <style:text-properties officeooo:rsid="00ffc14b"/>
    </style:style>
    <style:style style:name="T40" style:family="text">
      <style:text-properties officeooo:rsid="0049279c"/>
    </style:style>
    <style:style style:name="T41" style:family="text">
      <style:text-properties officeooo:rsid="01058066"/>
    </style:style>
    <style:style style:name="T42" style:family="text">
      <style:text-properties officeooo:rsid="0109554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7"><text:span text:style-name="T10">QuickTake</text:span> for Apple II</text:p>
      <text:p text:style-name="P7"/>
      <text:p text:style-name="P7">User guide</text:p>
      <text:p text:style-name="P3"/>
      <text:p text:style-name="P5">Version <text:span text:style-name="T29">2</text:span><text:span text:style-name="T31">4.0.</text:span><text:span text:style-name="T41">17</text:span></text:p>
      <text:p text:style-name="P55">May 2026</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8">colin@colino.net – https://</text:span><text:span text:style-name="T9">www.</text:span><text:span text:style-name="T8">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8">Table of Contents</text:p>
          </text:index-title>
          <text:p text:style-name="P36"><text:a xlink:type="simple" xlink:href="#__RefHeading___Toc2673_1397740321" text:style-name="Index_20_Link" text:visited-style-name="Index_20_Link">Index of Figures<text:tab/>ii</text:a></text:p>
          <text:p text:style-name="P36"><text:a xlink:type="simple" xlink:href="#__RefHeading___Toc2675_1397740321" text:style-name="Index_20_Link" text:visited-style-name="Index_20_Link">Index of Tables<text:tab/>iii</text:a></text:p>
          <text:p text:style-name="P36"><text:a xlink:type="simple" xlink:href="#__RefHeading___Toc6618_899895566" text:style-name="Index_20_Link" text:visited-style-name="Index_20_Link">Introduction<text:tab/>4</text:a></text:p>
          <text:p text:style-name="P36"><text:a xlink:type="simple" xlink:href="#__RefHeading___Toc193_899895566" text:style-name="Index_20_Link" text:visited-style-name="Index_20_Link">Startup and initial configuration<text:tab/>5</text:a></text:p>
          <text:p text:style-name="P37"><text:a xlink:type="simple" xlink:href="#__RefHeading___Toc195_899895566" text:style-name="Index_20_Link" text:visited-style-name="Index_20_Link">Requirements<text:tab/>5</text:a></text:p>
          <text:p text:style-name="P37"><text:a xlink:type="simple" xlink:href="#__RefHeading___Toc195_899895566%20Copy%201" text:style-name="Index_20_Link" text:visited-style-name="Index_20_Link">Serial communications setup<text:tab/>5</text:a></text:p>
          <text:p text:style-name="P37"><text:a xlink:type="simple" xlink:href="#__RefHeading___Toc2105_1397740321" text:style-name="Index_20_Link" text:visited-style-name="Index_20_Link">The Quicktake 100 or 150 connection to an 8-bits Apple II (IIe, //c, //c+)<text:tab/>5</text:a></text:p>
          <text:p text:style-name="P37"><text:a xlink:type="simple" xlink:href="#__RefHeading___Toc1893_407892232" text:style-name="Index_20_Link" text:visited-style-name="Index_20_Link">Connecting the Quicktake 100 or 150 with the Connector Box<text:tab/>6</text:a></text:p>
          <text:p text:style-name="P37"><text:a xlink:type="simple" xlink:href="#__RefHeading___Toc1895_407892232" text:style-name="Index_20_Link" text:visited-style-name="Index_20_Link">Connecting the Quicktake 100 or 150 with a custom cable<text:tab/>7</text:a></text:p>
          <text:p text:style-name="P37"><text:a xlink:type="simple" xlink:href="#__RefHeading___Toc2107_1397740321" text:style-name="Index_20_Link" text:visited-style-name="Index_20_Link">Super Serial Cards configuration on the Apple IIe<text:tab/>8</text:a></text:p>
          <text:p text:style-name="P37"><text:a xlink:type="simple" xlink:href="#__RefHeading___Toc1897_407892232" text:style-name="Index_20_Link" text:visited-style-name="Index_20_Link">ImageWriter configuration<text:tab/>8</text:a></text:p>
          <text:p text:style-name="P37"><text:a xlink:type="simple" xlink:href="#__RefHeading___Toc1899_407892232" text:style-name="Index_20_Link" text:visited-style-name="Index_20_Link">The Quicktake 100/150 connection to an Apple IIgs<text:tab/>8</text:a></text:p>
          <text:p text:style-name="P37"><text:a xlink:type="simple" xlink:href="#__RefHeading___Toc2109_1397740321" text:style-name="Index_20_Link" text:visited-style-name="Index_20_Link">The Quicktake 200 connection<text:tab/>8</text:a></text:p>
          <text:p text:style-name="P37"><text:a xlink:type="simple" xlink:href="#__RefHeading___Toc2111_1397740321" text:style-name="Index_20_Link" text:visited-style-name="Index_20_Link">Verifying the connection<text:tab/>8</text:a></text:p>
          <text:p text:style-name="P36"><text:a xlink:type="simple" xlink:href="#__RefHeading___Toc2113_1397740321" text:style-name="Index_20_Link" text:visited-style-name="Index_20_Link">The main menu<text:tab/>10</text:a></text:p>
          <text:p text:style-name="P37"><text:a xlink:type="simple" xlink:href="#__RefHeading___Toc2133_1397740321" text:style-name="Index_20_Link" text:visited-style-name="Index_20_Link">Get one picture<text:tab/>10</text:a></text:p>
          <text:p text:style-name="P37"><text:a xlink:type="simple" xlink:href="#__RefHeading___Toc2135_1397740321" text:style-name="Index_20_Link" text:visited-style-name="Index_20_Link">Preview pictures<text:tab/>12</text:a></text:p>
          <text:p text:style-name="P37"><text:a xlink:type="simple" xlink:href="#__RefHeading___Toc2141_1397740321" text:style-name="Index_20_Link" text:visited-style-name="Index_20_Link">Delete all pictures<text:tab/>12</text:a></text:p>
          <text:p text:style-name="P37"><text:a xlink:type="simple" xlink:href="#__RefHeading___Toc2145_1397740321" text:style-name="Index_20_Link" text:visited-style-name="Index_20_Link">Snap a picture<text:tab/>12</text:a></text:p>
          <text:p text:style-name="P37"><text:a xlink:type="simple" xlink:href="#__RefHeading___Toc2149_1397740321" text:style-name="Index_20_Link" text:visited-style-name="Index_20_Link">Set camera name<text:tab/>13</text:a></text:p>
          <text:p text:style-name="P37"><text:a xlink:type="simple" xlink:href="#__RefHeading___Toc2153_1397740321" text:style-name="Index_20_Link" text:visited-style-name="Index_20_Link">Set camera time<text:tab/>13</text:a></text:p>
          <text:p text:style-name="P37"><text:a xlink:type="simple" xlink:href="#__RefHeading___Toc2157_1397740321" text:style-name="Index_20_Link" text:visited-style-name="Index_20_Link">Set quality to...<text:tab/>13</text:a></text:p>
          <text:p text:style-name="P37"><text:a xlink:type="simple" xlink:href="#__RefHeading___Toc2161_1397740321" text:style-name="Index_20_Link" text:visited-style-name="Index_20_Link">Set flash to...<text:tab/>13</text:a></text:p>
          <text:p text:style-name="P36"><text:a xlink:type="simple" xlink:href="#__RefHeading___Toc2165_1397740321" text:style-name="Index_20_Link" text:visited-style-name="Index_20_Link">Editing a picture<text:tab/>14</text:a></text:p>
          <text:p text:style-name="P37"><text:a xlink:type="simple" xlink:href="#__RefHeading___Toc2171_1397740321" text:style-name="Index_20_Link" text:visited-style-name="Index_20_Link">Brightness/contrast settings<text:tab/>14</text:a></text:p>
          <text:p text:style-name="P37"><text:a xlink:type="simple" xlink:href="#__RefHeading___Toc2177_1397740321" text:style-name="Index_20_Link" text:visited-style-name="Index_20_Link">Dithering<text:tab/>15</text:a></text:p>
          <text:p text:style-name="P37"><text:a xlink:type="simple" xlink:href="#__RefHeading___Toc2181_1397740321" text:style-name="Index_20_Link" text:visited-style-name="Index_20_Link">Rotation and reframing<text:tab/>15</text:a></text:p>
          <text:p text:style-name="P37"><text:a xlink:type="simple" xlink:href="#__RefHeading___Toc2189_1397740321" text:style-name="Index_20_Link" text:visited-style-name="Index_20_Link">Saving the result<text:tab/>16</text:a></text:p>
          <text:p text:style-name="P36"><text:a xlink:type="simple" xlink:href="#__RefHeading___Toc2195_1397740321" text:style-name="Index_20_Link" text:visited-style-name="Index_20_Link">Viewing DHGR pictures<text:tab/>17</text:a></text:p>
          <text:p text:style-name="P37"><text:a xlink:type="simple" xlink:href="#__RefHeading___Toc2211_1397740321" text:style-name="Index_20_Link" text:visited-style-name="Index_20_Link">Printing a picture<text:tab/>17</text:a></text:p>
          <text:p text:style-name="P36"><text:a xlink:type="simple" xlink:href="#__RefHeading___Toc2722_899895566" text:style-name="Index_20_Link" text:visited-style-name="Index_20_Link">Links and resources<text:tab/>18</text:a></text:p>
          <text:p text:style-name="P36"><text:a xlink:type="simple" xlink:href="#__RefHeading___Toc3798_899895566" text:style-name="Index_20_Link" text:visited-style-name="Index_20_Link">Thanks and acknowledgments<text:tab/>19</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h text:style-name="Figure_20_Index_20_Heading" text:outline-level="1">Index of Figures</text:h>
          </text:index-title>
          <text:p text:style-name="P39"><text:a xlink:type="simple" xlink:href="#Figure!7%7Csequence" text:style-name="Index_20_Link" text:visited-style-name="Index_20_Link">Figure 1: Connecting using the Connector Box<text:tab/>6</text:a></text:p>
          <text:p text:style-name="P39"><text:a xlink:type="simple" xlink:href="#Figure!0%7Csequence" text:style-name="Index_20_Link" text:visited-style-name="Index_20_Link">Figure 2: The serial configuration screen<text:tab/>9</text:a></text:p>
          <text:p text:style-name="P39"><text:a xlink:type="simple" xlink:href="#Figure!1%7Csequence" text:style-name="Index_20_Link" text:visited-style-name="Index_20_Link">Figure 3: Quicktake for Apple II's main menu<text:tab/>10</text:a></text:p>
          <text:p text:style-name="P39"><text:a xlink:type="simple" xlink:href="#Figure!2%7Csequence" text:style-name="Index_20_Link" text:visited-style-name="Index_20_Link"><text:soft-page-break/>Figure 4: Selecting the destination directory<text:tab/>11</text:a></text:p>
          <text:p text:style-name="P39"><text:a xlink:type="simple" xlink:href="#Figure!3%7Csequence" text:style-name="Index_20_Link" text:visited-style-name="Index_20_Link">Figure 5: Filling in the image name<text:tab/>11</text:a></text:p>
          <text:p text:style-name="P39"><text:a xlink:type="simple" xlink:href="#Figure!4%7Csequence" text:style-name="Index_20_Link" text:visited-style-name="Index_20_Link">Figure 6: Decompression of a picture<text:tab/>12</text:a></text:p>
          <text:p text:style-name="P39"><text:a xlink:type="simple" xlink:href="#Figure!5%7Csequence" text:style-name="Index_20_Link" text:visited-style-name="Index_20_Link">Figure 7: The picture edition screen<text:tab/>14</text:a></text:p>
          <text:p text:style-name="P39"><text:a xlink:type="simple" xlink:href="#Figure!6%7Csequence" text:style-name="Index_20_Link" text:visited-style-name="Index_20_Link">Figure 8: The reframing UI<text:tab/>1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Index of Tables</text:h>
          </text:index-title>
          <text:p text:style-name="P63">Table 1: Serial ports by Apple II type<text:tab/>5</text:p>
          <text:p text:style-name="P63">Table 2: Custom serial cable for Apple //c<text:tab/>7</text:p>
          <text:p text:style-name="P63">Table 3: Custom serial cable for Apple IIe<text:tab/>7</text:p>
          <text:p text:style-name="P63">Table 4: Custom serial cable for Apple //c+<text:tab/>7</text:p>
        </text:index-body>
      </text:table-index>
      <text:h text:style-name="P41" text:outline-level="1" text:is-list-header="true"/>
      <text:h text:style-name="P42" text:outline-level="1"><text:bookmark-start text:name="__RefHeading___Toc6618_899895566"/>Introduction<text:bookmark-end text:name="__RefHeading___Toc6618_899895566"/></text:h>
      <text:p text:style-name="Text_20_body">The <text:span text:style-name="T10">QuickTake </text:span>for Apple II project started <text:span text:style-name="T10">once Mastodon for Apple II neared completion</text:span><text:span text:style-name="T6">. </text:span><text:span text:style-name="T10">It seemed to be a continuity (I could use this to post pictures online using Mastodon), while also providing new challenges – reverse-engineering of serial protocols, of image codecs, and new kinds of optimisations.</text:span></text:p>
      <text:p text:style-name="P29">I have not been disappointed and am quite proud of the functionality that this little program provides. About all of the basic <text:span text:style-name="T28">image edition </text:span>things you’d do with a modern computer are doable with an Apple <text:span text:style-name="T30">II</text:span>, if only “a bit” slower. <text:span text:style-name="T27">And if </text:span><text:span text:style-name="T33">1</text:span><text:span text:style-name="T27"> to </text:span><text:span text:style-name="T33">3</text:span><text:span text:style-name="T27"> minutes to decompress a picture may seem a bit long, it was 90 minutes at first!</text:span></text:p>
      <text:p text:style-name="Text_20_body">This user guide is written to give the curious reader a sense of what can be done today with an Apple II - a machine built forty years ago! - and maybe give them the motivation to go through the initial setup <text:span text:style-name="T7">and</text:span> give this a real test, and marvel at the <text:span text:style-name="T33">560</text:span>x192 green-and-black images that once were state of the art.</text:p>
      <text:h text:style-name="P43" text:outline-level="1"><text:bookmark-start text:name="__RefHeading___Toc193_899895566"/>Startup and initial configuration<text:bookmark-end text:name="__RefHeading___Toc193_899895566"/></text:h>
      <text:h text:style-name="P48" text:outline-level="2"><text:bookmark-start text:name="__RefHeading___Toc195_899895566"/>Requirements<text:bookmark-end text:name="__RefHeading___Toc195_899895566"/></text:h>
      <text:p text:style-name="P8"/>
      <text:p text:style-name="P18">This software requires an Apple //c, //c+, IIgs; or <text:span text:style-name="T36">a </text:span>IIe with:</text:p>
      <text:list text:style-name="L1">
        <text:list-item>
          <text:p text:style-name="P64">an extended 80-columns card, providing 128kB of RAM total</text:p>
        </text:list-item>
        <text:list-item>
          <text:p text:style-name="P64"><text:span text:style-name="T16">two</text:span> <text:span text:style-name="T33">Super s</text:span>erial cards</text:p>
        </text:list-item>
      </text:list>
      <text:h text:style-name="P49" text:outline-level="2"><text:bookmark-start text:name="__RefHeading___Toc195_899895566 Copy 1"/>Serial communications setup<text:bookmark-end text:name="__RefHeading___Toc195_899895566 Copy 1"/></text:h>
      <text:p text:style-name="P8"/>
      <text:p text:style-name="P17">The serial slot<text:span text:style-name="T11">(s)</text:span> to use differs with <text:span text:style-name="T11">the camera you want to connect, and with </text:span>different iterations of the Apple II computer.</text:p>
      <text:p text:style-name="P9"/>
      <table:table table:name="Table1" table:style-name="Table1" table:template-name="Horizontal lines">
        <table:table-column table:style-name="Table1.A"/>
        <table:table-column table:style-name="Table1.B"/>
        <table:table-header-rows>
          <table:table-row>
            <table:table-cell table:style-name="Table1.A1" office:value-type="string">
              <text:p text:style-name="P14">Apple II type</text:p>
            </table:table-cell>
            <table:table-cell table:style-name="Table1.A1" office:value-type="string">
              <text:p text:style-name="P14">Serial ports</text:p>
            </table:table-cell>
          </table:table-row>
        </table:table-header-rows>
        <table:table-row>
          <table:table-cell table:style-name="Table1.A1" office:value-type="string">
            <text:p text:style-name="P13">Apple //c and //c+</text:p>
          </table:table-cell>
          <table:table-cell table:style-name="Table1.A1" office:value-type="string">
            <text:p text:style-name="P13">Slot 1: Printer port</text:p>
            <text:p text:style-name="P13">Slot 2: Modem port</text:p>
          </table:table-cell>
        </table:table-row>
        <table:table-row>
          <table:table-cell table:style-name="Table1.A1" office:value-type="string">
            <text:p text:style-name="P13">Apple IIe</text:p>
          </table:table-cell>
          <table:table-cell table:style-name="Table1.A1" office:value-type="string">
            <text:p text:style-name="P13">Physical <text:span text:style-name="T1">installation slot</text:span><text:span text:style-name="T11">s</text:span> of the Super Serial Card<text:span text:style-name="T11">s</text:span></text:p>
          </table:table-cell>
        </table:table-row>
        <table:table-row table:style-name="Table1.4">
          <table:table-cell table:style-name="Table1.A1" office:value-type="string">
            <text:p text:style-name="P13">Apple IIgs</text:p>
          </table:table-cell>
          <table:table-cell table:style-name="Table1.A1" office:value-type="string">
            <text:p text:style-name="P13">Channel A: Printer</text:p>
            <text:p text:style-name="P13">Channel B: Modem</text:p>
          </table:table-cell>
        </table:table-row>
      </table:table>
      <text:p text:style-name="Table">Table <text:sequence text:ref-name="refTable0" text:name="Table" text:formula="ooow:Table+1" style:num-format="1">1</text:sequence>: Serial ports by Apple II type</text:p>
      <text:h text:style-name="Heading_20_2" text:outline-level="2"><text:bookmark-start text:name="__RefHeading___Toc2105_1397740321"/>The Quicktake 100 <text:span text:style-name="T38">or</text:span> 150 connection <text:span text:style-name="T12">to an </text:span><text:span text:style-name="T38">8-bits</text:span><text:span text:style-name="T12"> Apple II </text:span><text:span text:style-name="T35">(IIe, //c, //</text:span><text:span text:style-name="T38">c+</text:span><text:span text:style-name="T35">)</text:span><text:bookmark-end text:name="__RefHeading___Toc2105_1397740321"/></text:h>
      <text:p text:style-name="Text_20_body">The Quicktake 100 and 150 will not start talking to the computer as long as the DTR line is up. This is not a problem on an Apple IIgs, but will be on all 8-bits Apple II computers, as they use an ACIA-based Super Serial Card: as soon as DTR is deasserted, the ACIA serial chip completely stops communicating. This is a problem that has to be worked around in a hardware fashion. There are two ways to solve this: either using the Apple II Quicktake Connector Box, or building a custom cable.</text:p>
      <text:p text:style-name="Text_20_body">Using the Apple II Quicktake Connector Box has the advantage of letting you keep the printer connected to the computer, instead of having to switch the printer port cable for printing.</text:p>
      <text:p text:style-name="Text_20_body"/>
      <text:h text:style-name="P52" text:outline-level="2"><text:bookmark-start text:name="__RefHeading___Toc1893_407892232"/>Connecting the Quicktake 100 or 150 with the Connector Box<text:bookmark-end text:name="__RefHeading___Toc1893_407892232"/></text:h>
      <text:p text:style-name="Text_20_body">Connect the two DIN-5 cables to the Modem Port and Printer Port connectors on the Connector Box. Connect the other ends of these cables to your computer, using the necessary adapters if needed (for IIe and //c+).</text:p>
      <text:p text:style-name="P68">Connect the Quicktake to the Quicktake port of the Connector Box using a standard AppleTalk cable.</text:p>
      <text:p text:style-name="P68">If you have one, connect your printer to the ImageWriter port of the Connector Box, using a standard AppleTalk cable (plus adapter for the ImageWriter I).</text:p>
      <text:p text:style-name="P68"><draw:frame draw:style-name="fr1" draw:name="Frame8" text:anchor-type="char" svg:width="6.6953in" draw:z-index="14"><draw:text-box fo:min-height="4.0291in"><text:p text:style-name="Figure"><draw:frame draw:style-name="fr2" draw:name="Image8" text:anchor-type="paragraph" svg:width="6.6953in" style:rel-width="100%" svg:height="4.0291in" style:rel-height="scale" draw:z-index="15"><draw:image xlink:href="Pictures/100000010000057200000347E01864FA.png" xlink:type="simple" xlink:show="embed" xlink:actuate="onLoad" draw:mime-type="image/png"/></draw:frame>Figure <text:sequence text:ref-name="refFigure7" text:name="Figure" text:formula="ooow:Figure+1" style:num-format="1">1</text:sequence>: Connecting using the Connector Box</text:p></draw:text-box></draw:frame></text:p>
      <text:h text:style-name="P52" text:outline-level="2"><text:bookmark-start text:name="__RefHeading___Toc1895_407892232"/>Connecting the Quicktake 100 or 150 with a custom cable<text:bookmark-end text:name="__RefHeading___Toc1895_407892232"/></text:h>
      <text:p text:style-name="Text_20_body">Your custom serial cable will plug into the Quicktake on one end, and into two SSCs on the other ends. The cable will be Y shaped. Data will be handled by the modem port, and DTR will be handled by the printer port.</text:p>
      <text:p text:style-name="P57">Table <text:sequence text:ref-name="refTable1" text:name="Table" text:formula="ooow:Table+1" style:num-format="1">2</text:sequence>: Custom serial cable for Apple //c</text:p>
      <table:table table:name="Table4" table:style-name="Table4">
        <table:table-column table:style-name="Table4.A" table:number-columns-repeated="3"/>
        <table:table-column table:style-name="Table4.D"/>
        <table:table-row>
          <table:table-cell table:style-name="Table4.A1" office:value-type="string">
            <text:p text:style-name="P22">Mini-DIN-8 to QT</text:p>
          </table:table-cell>
          <table:table-cell table:style-name="Table4.A1" office:value-type="string">
            <text:p text:style-name="P22">DIN-5 modem port</text:p>
          </table:table-cell>
          <table:table-cell table:style-name="Table4.A1" office:value-type="string">
            <text:p text:style-name="P22">DIN-5 printer port</text:p>
          </table:table-cell>
          <table:table-cell table:style-name="Table4.D1" office:value-type="string">
            <text:p text:style-name="P22"/>
          </table:table-cell>
        </table:table-row>
        <table:table-row>
          <table:table-cell table:style-name="Table4.A2" office:value-type="string">
            <text:p text:style-name="P22"><text:s text:c="6"/><text:span text:style-name="T12">6 7 8</text:span></text:p>
            <text:p text:style-name="P22"><text:s text:c="5"/><text:span text:style-name="T12">3 4 <text:s text:c="2"/>5</text:span></text:p>
            <text:p text:style-name="P22"><text:s text:c="7"/><text:span text:style-name="T12">1 2</text:span></text:p>
          </table:table-cell>
          <table:table-cell table:style-name="Table4.A2" office:value-type="string">
            <text:p text:style-name="P20"><text:s text:c="4"/>1 <text:s text:c="6"/>5</text:p>
            <text:p text:style-name="P20"><text:s text:c="5"/>2 <text:s text:c="4"/>4</text:p>
            <text:p text:style-name="P20"><text:s text:c="8"/>3</text:p>
          </table:table-cell>
          <table:table-cell table:style-name="Table4.A2" office:value-type="string">
            <text:p text:style-name="P19"><text:s text:c="4"/>1 <text:s text:c="6"/>5</text:p>
            <text:p text:style-name="P20"><text:s text:c="5"/>2 <text:s text:c="4"/>4</text:p>
            <text:p text:style-name="P20"><text:s text:c="8"/>3</text:p>
          </table:table-cell>
          <table:table-cell table:style-name="Table4.D2" office:value-type="string">
            <text:p text:style-name="P20">Pin numbering, seen from front of male plug</text:p>
          </table:table-cell>
        </table:table-row>
        <table:table-row>
          <table:table-cell table:style-name="Table4.A2" office:value-type="string">
            <text:p text:style-name="P22">2<text:span text:style-name="T38">+7</text:span></text:p>
          </table:table-cell>
          <table:table-cell table:style-name="Table4.A2" office:value-type="string">
            <text:p text:style-name="P21"/>
          </table:table-cell>
          <table:table-cell table:style-name="Table4.A2" office:value-type="string">
            <text:p text:style-name="P22">1</text:p>
          </table:table-cell>
          <table:table-cell table:style-name="Table4.D2" office:value-type="string">
            <text:p text:style-name="P22">DTR</text:p>
          </table:table-cell>
        </table:table-row>
        <table:table-row>
          <table:table-cell table:style-name="Table4.A2" office:value-type="string">
            <text:p text:style-name="P22">3</text:p>
          </table:table-cell>
          <table:table-cell table:style-name="Table4.A2" office:value-type="string">
            <text:p text:style-name="P22">4</text:p>
          </table:table-cell>
          <table:table-cell table:style-name="Table4.A2" office:value-type="string">
            <text:p text:style-name="P21"/>
          </table:table-cell>
          <table:table-cell table:style-name="Table4.D2" office:value-type="string">
            <text:p text:style-name="P22">RX</text:p>
          </table:table-cell>
        </table:table-row>
        <table:table-row>
          <table:table-cell table:style-name="Table4.A2" office:value-type="string">
            <text:p text:style-name="P22">4</text:p>
          </table:table-cell>
          <table:table-cell table:style-name="Table4.A2" office:value-type="string">
            <text:p text:style-name="P22">3</text:p>
          </table:table-cell>
          <table:table-cell table:style-name="Table4.A2" office:value-type="string">
            <text:p text:style-name="P25"/>
          </table:table-cell>
          <table:table-cell table:style-name="Table4.D2" office:value-type="string">
            <text:p text:style-name="P22">GND</text:p>
          </table:table-cell>
        </table:table-row>
        <table:table-row>
          <table:table-cell table:style-name="Table4.A2" office:value-type="string">
            <text:p text:style-name="P22">5</text:p>
          </table:table-cell>
          <table:table-cell table:style-name="Table4.A2" office:value-type="string">
            <text:p text:style-name="P22">2</text:p>
          </table:table-cell>
          <table:table-cell table:style-name="Table4.A2" office:value-type="string">
            <text:p text:style-name="P21"/>
          </table:table-cell>
          <table:table-cell table:style-name="Table4.D2" office:value-type="string">
            <text:p text:style-name="P22">TX</text:p>
          </table:table-cell>
        </table:table-row>
      </table:table>
      <text:p text:style-name="P57">Table <text:sequence text:ref-name="refTable2" text:name="Table" text:formula="ooow:Table+1" style:num-format="1">3</text:sequence>: Custom serial cable for Apple IIe</text:p>
      <table:table table:name="Table10" table:style-name="Table10">
        <table:table-column table:style-name="Table10.A" table:number-columns-repeated="3"/>
        <table:table-column table:style-name="Table10.D"/>
        <table:table-row>
          <table:table-cell table:style-name="Table10.A1" office:value-type="string">
            <text:p text:style-name="P23">Mini-DIN-8 <text:span text:style-name="T38">to QT</text:span></text:p>
          </table:table-cell>
          <table:table-cell table:style-name="Table10.A1" office:value-type="string">
            <text:p text:style-name="P23"><text:span text:style-name="T12">DB-25 </text:span>modem port</text:p>
          </table:table-cell>
          <table:table-cell table:style-name="Table10.A1" office:value-type="string">
            <text:p text:style-name="P23"><text:span text:style-name="T12">DB-25 </text:span>printer port</text:p>
          </table:table-cell>
          <table:table-cell table:style-name="Table10.D1" office:value-type="string">
            <text:p text:style-name="P23"/>
          </table:table-cell>
        </table:table-row>
        <table:table-row>
          <table:table-cell table:style-name="Table10.A2" office:value-type="string">
            <text:p text:style-name="P23"><text:s text:c="6"/><text:span text:style-name="T12">6 7 8</text:span></text:p>
            <text:p text:style-name="P23"><text:s text:c="5"/><text:span text:style-name="T12">3 4 <text:s text:c="2"/>5</text:span></text:p>
            <text:p text:style-name="P23"><text:s text:c="7"/><text:span text:style-name="T12">1 2</text:span></text:p>
          </table:table-cell>
          <table:table-cell table:style-name="Table10.A2" office:value-type="string">
            <text:p text:style-name="P20">1 2 3 4...11 12 13</text:p>
            <text:p text:style-name="P20"><text:s/>14 15 ... 24 25</text:p>
          </table:table-cell>
          <table:table-cell table:style-name="Table10.A2" office:value-type="string">
            <text:p text:style-name="P20">1 2 3 4...11 12 13</text:p>
            <text:p text:style-name="P20"><text:s/>14 15 ... 24 25</text:p>
          </table:table-cell>
          <table:table-cell table:style-name="Table10.D2" office:value-type="string">
            <text:p text:style-name="P20">Pin numbering, seen from front of male plug</text:p>
          </table:table-cell>
        </table:table-row>
        <table:table-row>
          <table:table-cell table:style-name="Table10.A2" office:value-type="string">
            <text:p text:style-name="P23">2<text:span text:style-name="T38">+7</text:span></text:p>
          </table:table-cell>
          <table:table-cell table:style-name="Table10.A2" office:value-type="string">
            <text:p text:style-name="P24"/>
          </table:table-cell>
          <table:table-cell table:style-name="Table10.A2" office:value-type="string">
            <text:p text:style-name="P20">20</text:p>
          </table:table-cell>
          <table:table-cell table:style-name="Table10.D2" office:value-type="string">
            <text:p text:style-name="P23">DTR</text:p>
          </table:table-cell>
        </table:table-row>
        <table:table-row>
          <table:table-cell table:style-name="Table10.A2" office:value-type="string">
            <text:p text:style-name="P23">3</text:p>
          </table:table-cell>
          <table:table-cell table:style-name="Table10.A2" office:value-type="string">
            <text:p text:style-name="P20">3</text:p>
          </table:table-cell>
          <table:table-cell table:style-name="Table10.A2" office:value-type="string">
            <text:p text:style-name="P24"/>
          </table:table-cell>
          <table:table-cell table:style-name="Table10.D2" office:value-type="string">
            <text:p text:style-name="P23">RX</text:p>
          </table:table-cell>
        </table:table-row>
        <table:table-row>
          <table:table-cell table:style-name="Table10.A2" office:value-type="string">
            <text:p text:style-name="P23">4</text:p>
          </table:table-cell>
          <table:table-cell table:style-name="Table10.A2" office:value-type="string">
            <text:p text:style-name="P20">7</text:p>
          </table:table-cell>
          <table:table-cell table:style-name="Table10.A2" office:value-type="string">
            <text:p text:style-name="P24"/>
          </table:table-cell>
          <table:table-cell table:style-name="Table10.D2" office:value-type="string">
            <text:p text:style-name="P23">GND</text:p>
          </table:table-cell>
        </table:table-row>
        <table:table-row>
          <table:table-cell table:style-name="Table10.A2" office:value-type="string">
            <text:p text:style-name="P23">5</text:p>
          </table:table-cell>
          <table:table-cell table:style-name="Table10.A2" office:value-type="string">
            <text:p text:style-name="P23">2</text:p>
          </table:table-cell>
          <table:table-cell table:style-name="Table10.A2" office:value-type="string">
            <text:p text:style-name="P24"/>
          </table:table-cell>
          <table:table-cell table:style-name="Table10.D2" office:value-type="string">
            <text:p text:style-name="P23">TX</text:p>
          </table:table-cell>
        </table:table-row>
      </table:table>
      <text:p text:style-name="P57">Table <text:sequence text:ref-name="refTable3" text:name="Table" text:formula="ooow:Table+1" style:num-format="1">4</text:sequence>: Custom serial cable for Apple //c+</text:p>
      <table:table table:name="Table2" table:style-name="Table2">
        <table:table-column table:style-name="Table2.A" table:number-columns-repeated="3"/>
        <table:table-column table:style-name="Table2.D"/>
        <table:table-row>
          <table:table-cell table:style-name="Table2.A1" office:value-type="string">
            <text:p text:style-name="P59">Mini-DIN-8 to QT</text:p>
          </table:table-cell>
          <table:table-cell table:style-name="Table2.A1" office:value-type="string">
            <text:p text:style-name="P59"><text:span text:style-name="T12">M-D-8 </text:span>modem port</text:p>
          </table:table-cell>
          <table:table-cell table:style-name="Table2.A1" office:value-type="string">
            <text:p text:style-name="P59"><text:span text:style-name="T12">M-D-8 </text:span>printer port</text:p>
          </table:table-cell>
          <table:table-cell table:style-name="Table2.D1" office:value-type="string">
            <text:p text:style-name="P59"/>
          </table:table-cell>
        </table:table-row>
        <table:table-row>
          <table:table-cell table:style-name="Table2.A2" office:value-type="string">
            <text:p text:style-name="P59"><text:s text:c="6"/><text:span text:style-name="T12">6 7 8</text:span></text:p>
            <text:p text:style-name="P59"><text:s text:c="5"/><text:span text:style-name="T12">3 4 <text:s text:c="2"/>5</text:span></text:p>
            <text:p text:style-name="P59"><text:s text:c="7"/><text:span text:style-name="T12">1 2</text:span></text:p>
          </table:table-cell>
          <table:table-cell table:style-name="Table2.A2" office:value-type="string">
            <text:p text:style-name="P56"><text:s text:c="6"/><text:span text:style-name="T12">6 7 8</text:span></text:p>
            <text:p text:style-name="P59"><text:s text:c="5"/><text:span text:style-name="T12">3 4 <text:s text:c="2"/>5</text:span></text:p>
            <text:p text:style-name="P59"><text:s text:c="7"/><text:span text:style-name="T12">1 2</text:span></text:p>
          </table:table-cell>
          <table:table-cell table:style-name="Table2.A2" office:value-type="string">
            <text:p text:style-name="P56"><text:s text:c="6"/><text:span text:style-name="T12">6 7 8</text:span></text:p>
            <text:p text:style-name="P59"><text:s text:c="5"/><text:span text:style-name="T12">3 4 <text:s text:c="2"/>5</text:span></text:p>
            <text:p text:style-name="P59"><text:s text:c="7"/><text:span text:style-name="T12">1 2</text:span></text:p>
          </table:table-cell>
          <table:table-cell table:style-name="Table2.D2" office:value-type="string">
            <text:p text:style-name="P60">Pin numbering, seen from front of male plug</text:p>
          </table:table-cell>
        </table:table-row>
        <table:table-row>
          <table:table-cell table:style-name="Table2.A2" office:value-type="string">
            <text:p text:style-name="P59">2<text:span text:style-name="T38">+7</text:span></text:p>
          </table:table-cell>
          <table:table-cell table:style-name="Table2.A2" office:value-type="string">
            <text:p text:style-name="P61"/>
          </table:table-cell>
          <table:table-cell table:style-name="Table2.A2" office:value-type="string">
            <text:p text:style-name="P60">20</text:p>
          </table:table-cell>
          <table:table-cell table:style-name="Table2.D2" office:value-type="string">
            <text:p text:style-name="P59">DTR</text:p>
          </table:table-cell>
        </table:table-row>
        <table:table-row>
          <table:table-cell table:style-name="Table2.A2" office:value-type="string">
            <text:p text:style-name="P59">3</text:p>
          </table:table-cell>
          <table:table-cell table:style-name="Table2.A2" office:value-type="string">
            <text:p text:style-name="P62">5</text:p>
          </table:table-cell>
          <table:table-cell table:style-name="Table2.A2" office:value-type="string">
            <text:p text:style-name="P61"/>
          </table:table-cell>
          <table:table-cell table:style-name="Table2.D2" office:value-type="string">
            <text:p text:style-name="P59">RX</text:p>
          </table:table-cell>
        </table:table-row>
        <table:table-row>
          <table:table-cell table:style-name="Table2.A2" office:value-type="string">
            <text:p text:style-name="P59">4</text:p>
          </table:table-cell>
          <table:table-cell table:style-name="Table2.A2" office:value-type="string">
            <text:p text:style-name="P62">4</text:p>
          </table:table-cell>
          <table:table-cell table:style-name="Table2.A2" office:value-type="string">
            <text:p text:style-name="P61"/>
          </table:table-cell>
          <table:table-cell table:style-name="Table2.D2" office:value-type="string">
            <text:p text:style-name="P59">GND</text:p>
          </table:table-cell>
        </table:table-row>
        <table:table-row>
          <table:table-cell table:style-name="Table2.A2" office:value-type="string">
            <text:p text:style-name="P59">5</text:p>
          </table:table-cell>
          <table:table-cell table:style-name="Table2.A2" office:value-type="string">
            <text:p text:style-name="P62">3</text:p>
          </table:table-cell>
          <table:table-cell table:style-name="Table2.A2" office:value-type="string">
            <text:p text:style-name="P61"/>
          </table:table-cell>
          <table:table-cell table:style-name="Table2.D2" office:value-type="string">
            <text:p text:style-name="P59">TX</text:p>
          </table:table-cell>
        </table:table-row>
      </table:table>
      <text:p text:style-name="P68"/>
      <text:h text:style-name="P53" text:outline-level="2"><text:bookmark-start text:name="__RefHeading___Toc2107_1397740321"/><text:soft-page-break/>Super Serial Cards configuration on the Apple IIe<text:bookmark-end text:name="__RefHeading___Toc2107_1397740321"/></text:h>
      <text:p text:style-name="P69">By default, Quicktake for Apple II will use the card in slot 2 as Modem port, and the card in slot 1 as Printer port. Both cards should be configured as follows:</text:p>
      <text:list text:style-name="L4">
        <text:list-item>
          <text:p text:style-name="P70">The jumper block should point towards MODEM</text:p>
        </text:list-item>
        <text:list-item>
          <text:p text:style-name="P70">Modem mode: SW1-5 and SW1-6 should be ON (closed)</text:p>
        </text:list-item>
        <text:list-item>
          <text:p text:style-name="P70">Interrupts: SW2-6 should be ON (closed)</text:p>
        </text:list-item>
        <text:list-item>
          <text:p text:style-name="P70">RS232C signals: SW1-7 should be ON (closed) and SW2-7 OFF (open)</text:p>
        </text:list-item>
      </text:list>
      <text:p text:style-name="P69">See the Super Serial Card user manual<text:note text:id="ftn0" text:note-class="footnote"><text:note-citation>1</text:note-citation><text:note-body><text:p text:style-name="Footnote"><text:a xlink:type="simple" xlink:href="https://mirrors.apple2.org.za/ftp.apple.asimov.net/documentation/hardware/io/%0Asuper_serial_card/Apple%20II%20Super%20Serial%20Card%20User's%20Manual.pdf" text:style-name="Internet_20_link" text:visited-style-name="Visited_20_Internet_20_Link"><text:span text:style-name="T42">https://mirrors.apple2.org.za/ftp.apple.asimov.net/documentation/hardware/io/%0Asuper_serial_card/Apple II Super Serial Card User's Manual.pdf</text:span></text:a></text:p></text:note-body></text:note> for more information.</text:p>
      <text:h text:style-name="Heading_20_2" text:outline-level="2"><text:bookmark-start text:name="__RefHeading___Toc1897_407892232"/>ImageWriter configuration<text:bookmark-end text:name="__RefHeading___Toc1897_407892232"/></text:h>
      <text:p text:style-name="P69">The ImageWriter should be configured for 9600bps, software flow control (XON/XOFF):</text:p>
      <text:list text:style-name="L5">
        <text:list-item>
          <text:p text:style-name="P71">9600 bps: SW2-1 and SW2-2 OFF (closed)</text:p>
        </text:list-item>
        <text:list-item>
          <text:p text:style-name="P71">XON/XOFF: SW2-3 OFF (closed)</text:p>
        </text:list-item>
      </text:list>
      <text:p text:style-name="P69">These settings are the same for both the ImageWriter I and II.</text:p>
      <text:p text:style-name="P76">See their user manuals<text:note text:id="ftn1" text:note-class="footnote"><text:note-citation>2</text:note-citation><text:note-body><text:p text:style-name="Footnote"><text:span text:style-name="T42">ImageWriter I: </text:span><text:a xlink:type="simple" xlink:href="https://documents.cdn.ifixit.com/kc5NFFCZCGGyMYxw.pdf" text:style-name="Internet_20_link" text:visited-style-name="Visited_20_Internet_20_Link">https://documents.cdn.ifixit.com/kc5NFFCZCGGyMYxw.pdf</text:a></text:p><text:p text:style-name="P40">ImageWriter II: <text:a xlink:type="simple" xlink:href="https://apple2online.com/wp-content/uploads/ImageWriter-II-Owners-Manual.pdf" text:style-name="Internet_20_link" text:visited-style-name="Visited_20_Internet_20_Link">https://apple2online.com/wp-content/uploads/ImageWriter-II-Owners-Manual.pdf</text:a></text:p></text:note-body></text:note> for more <text:span text:style-name="T42">information.</text:span></text:p>
      <text:h text:style-name="P53" text:outline-level="2"><text:bookmark-start text:name="__RefHeading___Toc1899_407892232"/>The Quicktake 100/150 connection to an Apple IIgs<text:bookmark-end text:name="__RefHeading___Toc1899_407892232"/></text:h>
      <text:p text:style-name="Text_20_body">A simple, standard AppleTalk cable will do the job.</text:p>
      <text:h text:style-name="P50" text:outline-level="2"><text:bookmark-start text:name="__RefHeading___Toc2109_1397740321"/>The Quicktake 200 connection<text:bookmark-end text:name="__RefHeading___Toc2109_1397740321"/></text:h>
      <text:p text:style-name="Text_20_body"><text:span text:style-name="T39">The Quicktake 200</text:span> is provided with a mini-jack to female DB-9 null-modem cable, so you will just need a male DIN-5 (for //c), DB-25 (for IIe) or Mini-DIN-8 (for IIgs) to male DB-9 straight cable.</text:p>
      <text:h text:style-name="Heading_20_2" text:outline-level="2"><text:bookmark-start text:name="__RefHeading___Toc2111_1397740321"/>Verifying the connection<text:bookmark-end text:name="__RefHeading___Toc2111_1397740321"/></text:h>
      <text:p text:style-name="Text_20_body">At startup, the software will try to connect to a Quicktake. If one is plugged in and turned on, <text:span text:style-name="T13">the connection will be made and you will arrive on </text:span><text:soft-page-break/><text:span text:style-name="T13">the main menu. Otherwise, you will be asked whether to configure the serial ports, or try again at a slower speed, 9600 bps.</text:span></text:p>
      <text:p text:style-name="Text_20_body">In the serial configuration screen, the Data slot is where you plug the QuickTake <text:span text:style-name="T14">data lines, and the Printer slot is where you plug the DTR line, if applicable.</text:span></text:p>
      <text:p text:style-name="Text_20_body">The Printer slot is also used for printing images, <text:span text:style-name="T33">but you will have to change the Quicktake cable with the printer cable before, of course.</text:span></text:p>
      <text:p text:style-name="P26"/>
      <text:p text:style-name="P26"/>
      <text:p text:style-name="P26"><draw:frame draw:style-name="fr1" draw:name="Frame1" text:anchor-type="char" svg:width="5.8228in" draw:z-index="0"><draw:text-box fo:min-height="1.948in"><text:p text:style-name="Figure"><draw:frame draw:style-name="fr3" draw:name="Image1" text:anchor-type="paragraph" svg:width="5.8228in" style:rel-width="100%" svg:height="1.948in" style:rel-height="scale" draw:z-index="1"><draw:image xlink:href="Pictures/100000010000022F000000BB98C4A68F.png" xlink:type="simple" xlink:show="embed" xlink:actuate="onLoad" draw:mime-type="image/png"/></draw:frame>Figure <text:sequence text:ref-name="refFigure0" text:name="Figure" text:formula="ooow:Figure+1" style:num-format="1">2</text:sequence>: The serial configuration screen</text:p></draw:text-box></draw:frame></text:p>
      <text:p text:style-name="P27">If you want to access image edition and viewing features without connecting your Quicktake, you can wait for the timeout and use the <text:span text:style-name="T16">N</text:span> key to stop trying to connect.</text:p>
      <text:h text:style-name="P45" text:outline-level="1"/>
      <text:h text:style-name="P46" text:outline-level="1"><text:bookmark-start text:name="__RefHeading___Toc2113_1397740321"/>The main menu<text:bookmark-end text:name="__RefHeading___Toc2113_1397740321"/></text:h>
      <text:p text:style-name="Text_20_body"><text:bookmark-start text:name="__RefHeading___Toc2115_1397740321"/>The main menu header will contain information about your camera, and present you with a list of actions.<text:bookmark-end text:name="__RefHeading___Toc2115_1397740321"/></text:p>
      <text:p text:style-name="Text_20_body"><draw:frame draw:style-name="fr1" draw:name="Frame2" text:anchor-type="char" svg:width="5.802in" draw:z-index="2"><draw:text-box fo:min-height="3.9374in"><text:p text:style-name="Figure"><draw:frame draw:style-name="fr3" draw:name="Image2" text:anchor-type="paragraph" svg:width="5.802in" style:rel-width="100%" svg:height="3.9374in" style:rel-height="scale" draw:z-index="3"><draw:image xlink:href="Pictures/100000010000022D0000017A9F5D19AF.png" xlink:type="simple" xlink:show="embed" xlink:actuate="onLoad" draw:mime-type="image/png"/></draw:frame>Figure <text:sequence text:ref-name="refFigure1" text:name="Figure" text:formula="ooow:Figure+1" style:num-format="1">3</text:sequence>: Quicktake for Apple II's main menu</text:p></draw:text-box></draw:frame></text:p>
      <text:p text:style-name="Text_20_body"><text:bookmark-start text:name="__RefHeading___Toc2117_1397740321"/>Some choices exist only for the Quicktake 100/150. These are:<text:bookmark-end text:name="__RefHeading___Toc2117_1397740321"/></text:p>
      <text:list text:style-name="L2">
        <text:list-item>
          <text:p text:style-name="P65"><text:bookmark-start text:name="__RefHeading___Toc2119_1397740321"/>Preview pictures<text:bookmark-end text:name="__RefHeading___Toc2119_1397740321"/></text:p>
        </text:list-item>
        <text:list-item>
          <text:p text:style-name="P65"><text:bookmark-start text:name="__RefHeading___Toc2121_1397740321"/>Delete all pictures<text:bookmark-end text:name="__RefHeading___Toc2121_1397740321"/></text:p>
        </text:list-item>
        <text:list-item>
          <text:p text:style-name="P65"><text:bookmark-start text:name="__RefHeading___Toc2123_1397740321"/>Snap a picture<text:bookmark-end text:name="__RefHeading___Toc2123_1397740321"/></text:p>
        </text:list-item>
        <text:list-item>
          <text:p text:style-name="P65"><text:bookmark-start text:name="__RefHeading___Toc2125_1397740321"/>Set <text:span text:style-name="T19">c</text:span>amera name<text:bookmark-end text:name="__RefHeading___Toc2125_1397740321"/></text:p>
        </text:list-item>
        <text:list-item>
          <text:p text:style-name="P65"><text:bookmark-start text:name="__RefHeading___Toc2127_1397740321"/>Set <text:span text:style-name="T19">c</text:span>amera time<text:bookmark-end text:name="__RefHeading___Toc2127_1397740321"/></text:p>
        </text:list-item>
        <text:list-item>
          <text:p text:style-name="P65"><text:bookmark-start text:name="__RefHeading___Toc2129_1397740321"/>Set quality mode<text:bookmark-end text:name="__RefHeading___Toc2129_1397740321"/></text:p>
        </text:list-item>
        <text:list-item>
          <text:p text:style-name="P65"><text:bookmark-start text:name="__RefHeading___Toc2131_1397740321"/>Set flash mode<text:bookmark-end text:name="__RefHeading___Toc2131_1397740321"/></text:p>
        </text:list-item>
      </text:list>
      <text:h text:style-name="P51" text:outline-level="2"><text:bookmark-start text:name="__RefHeading___Toc2133_1397740321"/>Get one picture<text:bookmark-end text:name="__RefHeading___Toc2133_1397740321"/></text:h>
      <text:p text:style-name="Text_20_body">When you select “Get one picture”, the software will ask you for the number of the picture you want to download and edit. It will then ask you for the <text:soft-page-break/>destination directory (using a file selector). Navigate to the desired directory using the directional keys and validate with <text:span text:style-name="T16">Enter</text:span>. </text:p>
      <text:p text:style-name="Text_20_body"><draw:frame draw:style-name="fr1" draw:name="Frame3" text:anchor-type="char" svg:width="5.8126in" draw:z-index="4"><draw:text-box fo:min-height="3.2917in"><text:p text:style-name="Figure"><draw:frame draw:style-name="fr3" draw:name="Image3" text:anchor-type="paragraph" svg:width="5.8126in" style:rel-width="100%" svg:height="3.2917in" style:rel-height="scale" draw:z-index="5"><draw:image xlink:href="Pictures/100000010000022E0000013C665EB110.png" xlink:type="simple" xlink:show="embed" xlink:actuate="onLoad" draw:mime-type="image/png"/></draw:frame>Figure <text:sequence text:ref-name="refFigure2" text:name="Figure" text:formula="ooow:Figure+1" style:num-format="1">4</text:sequence>: Selecting the destination directory</text:p></draw:text-box></draw:frame>Then, complete the path with the desired image name and press <text:span text:style-name="T16">Enter</text:span>.</text:p>
      <text:p text:style-name="Text_20_body"><draw:frame draw:style-name="fr1" draw:name="Frame4" text:anchor-type="char" svg:width="5.8126in" draw:z-index="6"><draw:text-box fo:min-height="2.3335in"><text:p text:style-name="Figure"><draw:frame draw:style-name="fr3" draw:name="Image4" text:anchor-type="paragraph" svg:width="5.8126in" style:rel-width="100%" svg:height="2.3335in" style:rel-height="scale" draw:z-index="7"><draw:image xlink:href="Pictures/100000010000022E000000E0CEFE2489.png" xlink:type="simple" xlink:show="embed" xlink:actuate="onLoad" draw:mime-type="image/png"/></draw:frame>Figure <text:sequence text:ref-name="refFigure3" text:name="Figure" text:formula="ooow:Figure+1" style:num-format="1">5</text:sequence>: Filling in the image name</text:p></draw:text-box></draw:frame></text:p>
      <text:p text:style-name="Text_20_body">You can cancel the process and return to the main menu using the <text:span text:style-name="T16">Escape</text:span> key.</text:p>
      <text:p text:style-name="Text_20_body">The software will now download the picture to disk, and start converting it.</text:p>
      <text:p text:style-name="Text_20_body"><draw:frame draw:style-name="fr1" draw:name="Frame5" text:anchor-type="char" svg:width="5.802in" draw:z-index="8"><draw:text-box fo:min-height="3.9689in"><text:p text:style-name="Figure"><draw:frame draw:style-name="fr3" draw:name="Image5" text:anchor-type="paragraph" svg:width="5.802in" style:rel-width="100%" svg:height="3.9689in" style:rel-height="scale" draw:z-index="9"><draw:image xlink:href="Pictures/100000010000022D0000017D472ADE61.png" xlink:type="simple" xlink:show="embed" xlink:actuate="onLoad" draw:mime-type="image/png"/></draw:frame>Figure <text:sequence text:ref-name="refFigure4" text:name="Figure" text:formula="ooow:Figure+1" style:num-format="1">6</text:sequence>: Decompression of a picture</text:p></draw:text-box></draw:frame><text:soft-page-break/>Once the process is finished, you will be able to edit the picture.</text:p>
      <text:h text:style-name="Heading_20_2" text:outline-level="2"><text:bookmark-start text:name="__RefHeading___Toc2135_1397740321"/>Preview pictures<text:bookmark-end text:name="__RefHeading___Toc2135_1397740321"/></text:h>
      <text:p text:style-name="Text_20_body"><text:bookmark-start text:name="__RefHeading___Toc2137_1397740321"/>When you select “Preview pictures”, you will be shown the thumbnail for the first picture in your Quicktake, <text:span text:style-name="T15">along with the picture’s date and time, the quality mode used to shoot it, and whether the flash was active. You can decide to download the picture (</text:span><text:span text:style-name="T17">G</text:span><text:span text:style-name="T15"> key), return to the menu (</text:span><text:span text:style-name="T17">Escape</text:span><text:span text:style-name="T15"> key), or proceed to the next thumbnail (any other key).</text:span><text:bookmark-end text:name="__RefHeading___Toc2137_1397740321"/></text:p>
      <text:p text:style-name="Text_20_body"><text:bookmark-start text:name="__RefHeading___Toc2139_1397740321"/>The software will remember the last viewed thumbnail during the session, and start again at the next one if you re-use the <text:span text:style-name="T16">Preview pictures</text:span> function.<text:bookmark-end text:name="__RefHeading___Toc2139_1397740321"/></text:p>
      <text:p text:style-name="P33">The thumbnails can be hard to parse as they are 40x80 pixels with 4 levels of gray.</text:p>
      <text:h text:style-name="Heading_20_2" text:outline-level="2"><text:bookmark-start text:name="__RefHeading___Toc2141_1397740321"/>Delete all pictures<text:bookmark-end text:name="__RefHeading___Toc2141_1397740321"/></text:h>
      <text:p text:style-name="Text_20_body"><text:bookmark-start text:name="__RefHeading___Toc2143_1397740321"/>Use this function to empty your Quicktake 100/150 memory.<text:bookmark-end text:name="__RefHeading___Toc2143_1397740321"/></text:p>
      <text:h text:style-name="Heading_20_2" text:outline-level="2"><text:bookmark-start text:name="__RefHeading___Toc2145_1397740321"/>Snap a picture<text:bookmark-end text:name="__RefHeading___Toc2145_1397740321"/></text:h>
      <text:p text:style-name="Text_20_body"><text:bookmark-start text:name="__RefHeading___Toc2147_1397740321"/>Use this function to trigger the Quicktake 100/150 to take a picture. <text:span text:style-name="T37">This is useful in a “studio” setting with the camera mounted to a tripod, for example.</text:span><text:bookmark-end text:name="__RefHeading___Toc2147_1397740321"/></text:p>
      <text:h text:style-name="Heading_20_2" text:outline-level="2"><text:bookmark-start text:name="__RefHeading___Toc2149_1397740321"/><text:soft-page-break/>Set camera name<text:bookmark-end text:name="__RefHeading___Toc2149_1397740321"/></text:h>
      <text:p text:style-name="Text_20_body"><text:bookmark-start text:name="__RefHeading___Toc2151_1397740321"/>Use this function to change your Quicktake 100/150’s name.<text:bookmark-end text:name="__RefHeading___Toc2151_1397740321"/></text:p>
      <text:h text:style-name="Heading_20_2" text:outline-level="2"><text:bookmark-start text:name="__RefHeading___Toc2153_1397740321"/>Set camera time<text:bookmark-end text:name="__RefHeading___Toc2153_1397740321"/></text:h>
      <text:p text:style-name="Text_20_body"><text:bookmark-start text:name="__RefHeading___Toc2155_1397740321"/>Use this function to set your Quicktake 100/150’s clock.<text:bookmark-end text:name="__RefHeading___Toc2155_1397740321"/></text:p>
      <text:h text:style-name="Heading_20_2" text:outline-level="2"><text:bookmark-start text:name="__RefHeading___Toc2157_1397740321"/>Set quality to...<text:bookmark-end text:name="__RefHeading___Toc2157_1397740321"/></text:h>
      <text:p text:style-name="Text_20_body"><text:bookmark-start text:name="__RefHeading___Toc2159_1397740321"/>Use this function to change the selected quality mode of your Quicktake 100/150.<text:bookmark-end text:name="__RefHeading___Toc2159_1397740321"/></text:p>
      <text:h text:style-name="Heading_20_2" text:outline-level="2"><text:bookmark-start text:name="__RefHeading___Toc2161_1397740321"/>Set flash to...<text:bookmark-end text:name="__RefHeading___Toc2161_1397740321"/></text:h>
      <text:p text:style-name="Text_20_body"><text:bookmark-start text:name="__RefHeading___Toc2163_1397740321"/>Use this function to change the selected flash mode of your Quicktake 100/150.<text:bookmark-end text:name="__RefHeading___Toc2163_1397740321"/></text:p>
      <text:h text:style-name="P66" text:outline-level="1"/>
      <text:h text:style-name="P47" text:outline-level="1"><text:bookmark-start text:name="__RefHeading___Toc2165_1397740321"/>Editing a picture<text:bookmark-end text:name="__RefHeading___Toc2165_1397740321"/></text:h>
      <text:p text:style-name="Text_20_body"><text:bookmark-start text:name="__RefHeading___Toc2167_1397740321"/><text:span text:style-name="T22">You can open </text:span>the picture edition screen <text:span text:style-name="T22">in two ways. It is automatically opened after a raw picture is downloaded from the Quicktake camera, and a raw picture stored on disk can be re-edited using the main menu’s “</text:span><text:span text:style-name="T18">Re-edit a raw picture from floppy</text:span><text:span text:style-name="T22">” item.</text:span><text:bookmark-end text:name="__RefHeading___Toc2167_1397740321"/></text:p>
      <text:p text:style-name="Text_20_body"><text:bookmark-start text:name="__RefHeading___Toc2169_1397740321"/><text:span text:style-name="T22">In this screen,</text:span> you will be able to tweak a few settings to make the best out of the picture. The help at the bottom of the screen will remind you of the available commands; <text:span text:style-name="T34">it is</text:span> hidden <text:span text:style-name="T34">by default </text:span>(in order to see the bottom of the picture), <text:span text:style-name="T34">but you can show it by pressing Space</text:span>.<text:bookmark-end text:name="__RefHeading___Toc2169_1397740321"/></text:p>
      <text:p text:style-name="Text_20_body"><draw:frame draw:style-name="fr1" draw:name="Frame6" text:anchor-type="char" svg:width="5.7811in" draw:z-index="10"><draw:text-box fo:min-height="3.9791in"><text:p text:style-name="Figure"><draw:frame draw:style-name="fr3" draw:name="Image6" text:anchor-type="paragraph" svg:width="5.7811in" style:rel-width="100%" svg:height="3.9791in" style:rel-height="scale" draw:z-index="11"><draw:image xlink:href="Pictures/1000000000000230000001802E2503E5.png" xlink:type="simple" xlink:show="embed" xlink:actuate="onLoad" draw:mime-type="image/png"/></draw:frame>Figure <text:sequence text:ref-name="refFigure5" text:name="Figure" text:formula="ooow:Figure+1" style:num-format="1">7</text:sequence>: The picture edition screen</text:p></draw:text-box></draw:frame></text:p>
      <text:h text:style-name="Heading_20_2" text:outline-level="2"><text:bookmark-start text:name="__RefHeading___Toc2171_1397740321"/>Brightness/contrast settings<text:bookmark-end text:name="__RefHeading___Toc2171_1397740321"/></text:h>
      <text:p text:style-name="Text_20_body"><text:bookmark-start text:name="__RefHeading___Toc2173_1397740321"/>You can disable or enable auto-leveling. This feature finds the darkest and clearest parts of the picture, and re-equalizes the histogram so that the darkest is black, and the clearest is white. This often gives better results, but not always.<text:bookmark-end text:name="__RefHeading___Toc2173_1397740321"/></text:p>
      <text:p text:style-name="Text_20_body"><text:bookmark-start text:name="__RefHeading___Toc2175_1397740321"/>You can also manually brighten or darken the picture. If the most interesting parts of a picture are washed-out white, for example, try darkening it a bit.<text:bookmark-end text:name="__RefHeading___Toc2175_1397740321"/></text:p>
      <text:h text:style-name="Heading_20_2" text:outline-level="2"><text:bookmark-start text:name="__RefHeading___Toc2177_1397740321"/><text:soft-page-break/>Dithering<text:bookmark-end text:name="__RefHeading___Toc2177_1397740321"/></text:h>
      <text:p text:style-name="Text_20_body"><text:bookmark-start text:name="__RefHeading___Toc2179_1397740321"/>Dithering is the process of reducing the palette. Different algorithms are available: Sierra Lite dithering is the default one, using error diffusion and often giving the best results. Bayer dithering is also available, using ordered dithering instead of error diffusion, and giving quite a different look to the picture. No dithering is also an option, although its use is dubious. <text:bookmark-end text:name="__RefHeading___Toc2179_1397740321"/></text:p>
      <text:h text:style-name="Heading_20_2" text:outline-level="2"><text:bookmark-start text:name="__RefHeading___Toc2181_1397740321"/>Rotation and <text:span text:style-name="T21">refram</text:span>ing<text:bookmark-end text:name="__RefHeading___Toc2181_1397740321"/></text:h>
      <text:p text:style-name="Text_20_body"><text:bookmark-start text:name="__RefHeading___Toc2183_1397740321"/>If your picture was shot in landscape mode, it will be 256x192 pixels. If it was shot in portrait mode, you will be able to rotate it left or right. By default, the picture will be rescaled so that all of it fits on-screen, resulting in a 144x192 pixels picture. If you prefer to zoom into the middle part of the picture, you can choose Crop instead of Fit; the picture will then be 192x192 pixels.<text:bookmark-end text:name="__RefHeading___Toc2183_1397740321"/></text:p>
      <text:p text:style-name="Text_20_body"><text:bookmark-start text:name="__RefHeading___Toc2185_1397740321"/>When the picture is not rotated, you will be able to <text:span text:style-name="T21">reframe it:</text:span> zoom in a part of a picture. <text:bookmark-end text:name="__RefHeading___Toc2185_1397740321"/></text:p>
      <text:p text:style-name="P34"><text:bookmark-start text:name="__RefHeading___Toc2187_1397740321"/><draw:frame draw:style-name="fr1" draw:name="Frame7" text:anchor-type="char" svg:width="5.8126in" draw:z-index="12"><draw:text-box fo:min-height="3.9898in"><text:p text:style-name="Figure"><draw:frame draw:style-name="fr3" draw:name="Image7" text:anchor-type="paragraph" svg:width="5.8126in" style:rel-width="100%" svg:height="3.9898in" style:rel-height="scale" draw:z-index="13"><draw:image xlink:href="Pictures/100000000000023000000180BB133A48.png" xlink:type="simple" xlink:show="embed" xlink:actuate="onLoad" draw:mime-type="image/png"/></draw:frame>Figure <text:sequence text:ref-name="refFigure6" text:name="Figure" text:formula="ooow:Figure+1" style:num-format="1">8</text:sequence>: The reframing UI</text:p></draw:text-box></draw:frame><text:span text:style-name="T20">The levels of zoom available depend on the resolution of the </text:span><text:span text:style-name="T23">raw </text:span><text:span text:style-name="T20">picture. A Quicktake 100 raw standard-resolution picture is 320x240 pixels, and you will be able to zoom in</text:span><text:span text:style-name="T24">to</text:span><text:span text:style-name="T20"> a 256x192 region of it. Quicktake 100 high-</text:span><text:soft-page-break/><text:span text:style-name="T20">resolution pictures are 640x480, and you will be able to zoom in</text:span><text:span text:style-name="T24">to</text:span><text:span text:style-name="T20"> regions of either 512x384 pixels, 320x240 pixels or 256x192 pixels.</text:span><text:bookmark-end text:name="__RefHeading___Toc2187_1397740321"/></text:p>
      <text:p text:style-name="P35">The Quicktake 150 and 200 pictures, while being 640x480, are decompressed to 320x240 and you will only be able to zoom into a 256x192 region of them.</text:p>
      <text:p text:style-name="P34">Validating the reframing triggers a new decompression in order to achieve a good quality result.</text:p>
      <text:p text:style-name="P30">Even though the Quicktake for Apple II decoders downscale pictures to 256x192 – in order to keep memory requirements low enough -, the dithering process dithers to DHGR, so the resulting pictures are 512x192 pixels. The resulting smoothing of the error diffusion gives notably better results.</text:p>
      <text:h text:style-name="Heading_20_2" text:outline-level="2"><text:bookmark-start text:name="__RefHeading___Toc2189_1397740321"/>Saving the result<text:bookmark-end text:name="__RefHeading___Toc2189_1397740321"/></text:h>
      <text:p text:style-name="Text_20_body"><text:bookmark-start text:name="__RefHeading___Toc2191_1397740321"/>Once you are happy with the results, you can save the picture in <text:span text:style-name="T31">D</text:span>HGR format. This is the format that will allow you to quickly re-view converted pictures, print them, or if you feel like it, send them using Mastodon for Apple II!<text:bookmark-end text:name="__RefHeading___Toc2191_1397740321"/></text:p>
      <text:p text:style-name="Text_20_body"><text:bookmark-start text:name="__RefHeading___Toc2193_1397740321"/>By default, the <text:span text:style-name="T32">D</text:span>HGR picture name will be saved with the same name as the raw picture, with a .<text:span text:style-name="T32">D</text:span>HGR extension.<text:bookmark-end text:name="__RefHeading___Toc2193_1397740321"/></text:p>
      <text:h text:style-name="P44" text:outline-level="1"/>
      <text:h text:style-name="P47" text:outline-level="1"><text:bookmark-start text:name="__RefHeading___Toc2195_1397740321"/>Viewing <text:span text:style-name="T32">D</text:span>HGR pictures<text:bookmark-end text:name="__RefHeading___Toc2195_1397740321"/></text:h>
      <text:p text:style-name="Text_20_body"><text:bookmark-start text:name="__RefHeading___Toc2197_1397740321"/>You can view your <text:span text:style-name="T32">D</text:span>HGR pictures with the software of your choice, and Quicktake for Apple II comes with a basic image viewer.<text:bookmark-end text:name="__RefHeading___Toc2197_1397740321"/></text:p>
      <text:p text:style-name="Text_20_body"><text:bookmark-start text:name="__RefHeading___Toc2199_1397740321"/>Choose “<text:span text:style-name="T16">View a converted picture from floppy</text:span>” to launch it, then select the picture you want to view using the file selector.<text:bookmark-end text:name="__RefHeading___Toc2199_1397740321"/></text:p>
      <text:p text:style-name="Text_20_body"><text:bookmark-start text:name="__RefHeading___Toc2201_1397740321"/>The controls of the image viewer are rather simple:<text:bookmark-end text:name="__RefHeading___Toc2201_1397740321"/></text:p>
      <text:list text:style-name="L3">
        <text:list-item>
          <text:p text:style-name="P67"><text:bookmark-start text:name="__RefHeading___Toc2203_1397740321"/><text:span text:style-name="T25">The </text:span><text:span text:style-name="T16">Space</text:span> key allows you to open the next picture in the same directory (and loops over all pictures of this directory).<text:bookmark-end text:name="__RefHeading___Toc2203_1397740321"/></text:p>
        </text:list-item>
        <text:list-item>
          <text:p text:style-name="P67"><text:bookmark-start text:name="__RefHeading___Toc2205_1397740321"/>The <text:span text:style-name="T16">Escape</text:span> key quits the viewer.<text:bookmark-end text:name="__RefHeading___Toc2205_1397740321"/></text:p>
        </text:list-item>
        <text:list-item>
          <text:p text:style-name="P67"><text:bookmark-start text:name="__RefHeading___Toc2207_1397740321"/>The <text:span text:style-name="T16">P</text:span> key allows you to print the picture to an ImageWriter II<text:bookmark-end text:name="__RefHeading___Toc2207_1397740321"/></text:p>
        </text:list-item>
        <text:list-item>
          <text:p text:style-name="P67"><text:bookmark-start text:name="__RefHeading___Toc2209_1397740321"/>Any other key toggles the inline help.<text:bookmark-end text:name="__RefHeading___Toc2209_1397740321"/></text:p>
        </text:list-item>
      </text:list>
      <text:h text:style-name="Heading_20_2" text:outline-level="2"><text:bookmark-start text:name="__RefHeading___Toc2211_1397740321"/>Printing a picture<text:bookmark-end text:name="__RefHeading___Toc2211_1397740321"/></text:h>
      <text:p text:style-name="Text_20_body"><text:bookmark-start text:name="__RefHeading___Toc2213_1397740321"/>Before you print a picture, you will be asked for the print scale. You can choose between 72dpi, where one pixel on screen equals one matrix dot and the resulting image will be approximately 9 x 6,7 centimeters; or 36 dpi, where one pixel on screen equals four matrix dots and the resulting image will be 18 x 13 centimeters.<text:bookmark-end text:name="__RefHeading___Toc2213_1397740321"/></text:p>
      <text:p text:style-name="Text_20_body"><text:bookmark-start text:name="__RefHeading___Toc2215_1397740321"/>Before starting to print, the software will remind you of the expected printer settings and let you, if necessary, unplug the Quicktake 100/150’s DTR line and plug the printer instead.<text:bookmark-end text:name="__RefHeading___Toc2215_1397740321"/></text:p>
      <text:p text:style-name="Text_20_body"><text:bookmark-start text:name="__RefHeading___Toc2217_1397740321"/>Note: only XON/XOFF flow control is supported. This is set on the ImageWriter II by toggling DIP switch 2-3 to off.<text:bookmark-end text:name="__RefHeading___Toc2217_1397740321"/></text:p>
      <text:h text:style-name="P47" text:outline-level="1"><text:bookmark-start text:name="__RefHeading___Toc2722_899895566"/>Links and resources<text:bookmark-end text:name="__RefHeading___Toc2722_899895566"/></text:h>
      <text:p text:style-name="P10">The project <text:span text:style-name="T2">code </text:span>lives at <text:a xlink:type="simple" xlink:href="https://github.com/colinleroy/a2tools/" text:style-name="Internet_20_link" text:visited-style-name="Visited_20_Internet_20_Link">https://github.com/colinleroy/a2tools/</text:a> </text:p>
      <text:p text:style-name="P10">Its homepage is at <text:a xlink:type="simple" xlink:href="https://www.colino.net/wordpress/en/quicktake-for-apple-ii/" text:style-name="Internet_20_link" text:visited-style-name="Visited_20_Internet_20_Link">https://www.colino.net/wordpress/en/quicktake-for-apple-ii/</text:a> </text:p>
      <text:p text:style-name="P74"><text:span text:style-name="T40">It is built using cc65, </text:span><text:a xlink:type="simple" xlink:href="https://github.com/cc65/cc65/" text:style-name="Internet_20_link" text:visited-style-name="Visited_20_Internet_20_Link"><text:span text:style-name="T40">https://github.com/cc65/cc65/</text:span></text:a><text:span text:style-name="T40"> </text:span></text:p>
      <text:p text:style-name="P73">The Quicktake Connector Box is available at <text:a xlink:type="simple" xlink:href="https://www.colino.net/shop/" text:style-name="Internet_20_link" text:visited-style-name="Visited_20_Internet_20_Link">https://www.colino.net/shop/</text:a></text:p>
      <text:h text:style-name="P47" text:outline-level="1"><text:bookmark-start text:name="__RefHeading___Toc3798_899895566"/>Thanks and acknowledgments<text:bookmark-end text:name="__RefHeading___Toc3798_899895566"/></text:h>
      <text:p text:style-name="P11"><text:span text:style-name="T3">Thanks to the #RetroComputing community, full of awesome people. They push me towards doing more and better. </text:span><text:span text:style-name="T26">Special thanks to @FozzTexx@fozztexx.com on Mastodon, for all his help on testing this software on a wide range of Apple II machines</text:span><text:span text:style-name="T5">.</text:span></text:p>
      <text:p text:style-name="P28">Many thanks <text:span text:style-name="T26">again </text:span>to Oliver Schmidt (https://github.com/oliverschmidt/), long-time cc65 contributor and Apple II hacker, for his patience and guidance when I need help to learn things, from linker configurations to 6502 assembly to acceptable-pull-request coding-style.</text:p>
      <text:p text:style-name="P75">Thanks to Pierre Dandumont for lending me a Quicktake 150 and 200, so that I could extend my program to also support those.</text:p>
      <text:p text:style-name="P75">Thanks to Jonathan Adar for testing, reporting bugs, suggesting good ideas, and his general enthusiasm.</text:p>
      <text:p text:style-name="P75">Thanks to Philippe Fernandez for gifting me an extra Super Serial Card and an ImageWriter.</text:p>
      <text:p text:style-name="P28">Heartfelt thanks to my soulmate Abigail for <text:span text:style-name="T34">their</text:span> encouragments, <text:span text:style-name="T34">their</text:span> incredible patience and tolerance to my deep-focus mode, <text:span text:style-name="T4">the mode in which</text:span> I can spend full week-ends doing nothing else and basically don’t live here (or anywhere) anymore. <text:span text:style-name="T26">Thank you for gifting me an ImageWriter II, knowing full well that meant more hacking time, with awful noises as a bonus! </text:span>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style:font-name="Latin Modern Mono3" fo:font-family="'Latin Modern Mono'" style:font-style-name="Regular"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5-05T22:19:18.054464734</dc:date>
    <meta:editing-duration>P2DT8H4M37S</meta:editing-duration>
    <meta:editing-cycles>226</meta:editing-cycles>
    <meta:generator>LibreOffice/24.2.7.2$Linux_X86_64 LibreOffice_project/420$Build-2</meta:generator>
    <meta:print-date>2023-09-21T10:14:18.194577295</meta:print-date>
    <meta:document-statistic meta:table-count="4" meta:image-count="8" meta:object-count="0" meta:page-count="19" meta:paragraph-count="270" meta:word-count="2762" meta:character-count="15744" meta:non-whitespace-character-count="13106"/>
  </office:meta>
</office:document-meta>
</file>