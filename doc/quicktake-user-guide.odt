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F000000BB98C4A68F.png" manifest:media-type="image/png"/>
  <manifest:file-entry manifest:full-path="Pictures/100000010000022D0000017A9F5D19AF.png" manifest:media-type="image/png"/>
  <manifest:file-entry manifest:full-path="Pictures/100000010000057200000347E01864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6736in" style:rel-column-width="16383*"/>
    </style:style>
    <style:style style:name="Table2.D" style:family="table-column">
      <style:table-column-properties style:column-width="1.674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058066" officeooo:paragraph-rsid="0105806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rsid="0049279c" officeooo:paragraph-rsid="0101d762"/>
    </style:style>
    <style:style style:name="P13" style:family="paragraph" style:parent-style-name="Text_20_body">
      <style:text-properties officeooo:paragraph-rsid="0059e122"/>
    </style:style>
    <style:style style:name="P14" style:family="paragraph" style:parent-style-name="Standard">
      <style:text-properties officeooo:paragraph-rsid="001acb08"/>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officeooo:paragraph-rsid="00dd6a7f"/>
    </style:style>
    <style:style style:name="P18" style:family="paragraph" style:parent-style-name="Text_20_body">
      <style:text-properties officeooo:rsid="00dd6a7f" officeooo:paragraph-rsid="00dd6a7f"/>
    </style:style>
    <style:style style:name="P19"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0"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1" style:family="paragraph" style:parent-style-name="Table_20_Contents">
      <style:text-properties style:font-name="Latin Modern Mono1" fo:font-size="12pt" officeooo:rsid="00bb93c2" officeooo:paragraph-rsid="00f9ceb7" style:font-size-asian="12pt" style:font-name-complex="Lohit Devanagari" style:font-size-complex="12pt"/>
    </style:style>
    <style:style style:name="P22" style:family="paragraph" style:parent-style-name="Table_20_Contents">
      <style:text-properties style:font-name="Latin Modern Mono1" fo:font-size="12pt" style:font-size-asian="12pt" style:font-name-complex="Lohit Devanagari" style:font-size-complex="12pt"/>
    </style:style>
    <style:style style:name="P23"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4"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5" style:family="paragraph" style:parent-style-name="Standard">
      <style:text-properties style:font-name="Latin Modern Mono1" fo:font-size="12pt" officeooo:rsid="00bb681d" officeooo:paragraph-rsid="00f9ceb7" style:font-size-asian="12pt" style:font-name-complex="Lohit Devanagari" style:font-size-complex="12pt"/>
    </style:style>
    <style:style style:name="P26" style:family="paragraph" style:parent-style-name="Table_20_Contents">
      <style:text-properties style:font-name="Latin Modern Mono1" fo:font-size="12pt" officeooo:rsid="00bb681d" officeooo:paragraph-rsid="00f9ceb7" style:font-size-asian="12pt" style:font-name-complex="Lohit Devanagari" style:font-size-complex="12pt"/>
    </style:style>
    <style:style style:name="P27" style:family="paragraph" style:parent-style-name="Table_20_Contents">
      <style:text-properties style:font-name="Latin Modern Mono1" fo:font-size="12pt" officeooo:paragraph-rsid="00bb93c2" style:font-size-asian="12pt" style:font-name-complex="Lohit Devanagari" style:font-size-complex="12pt"/>
    </style:style>
    <style:style style:name="P28"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9" style:family="paragraph" style:parent-style-name="Table_20_Contents">
      <style:text-properties style:font-name="Latin Modern Mono1" fo:font-size="12pt" officeooo:paragraph-rsid="00f9ceb7" style:font-size-asian="12pt" style:font-name-complex="Lohit Devanagari" style:font-size-complex="12pt"/>
    </style:style>
    <style:style style:name="P30" style:family="paragraph" style:parent-style-name="Table_20_Contents">
      <style:text-properties style:font-name="Latin Modern Mono1" fo:font-size="12pt" officeooo:rsid="00f9ceb7" officeooo:paragraph-rsid="00f9ceb7" style:font-size-asian="12pt" style:font-name-complex="Lohit Devanagari" style:font-size-complex="12pt"/>
    </style:style>
    <style:style style:name="P31" style:family="paragraph" style:parent-style-name="Table">
      <style:text-properties officeooo:rsid="00bed9d9" officeooo:paragraph-rsid="00bed9d9"/>
    </style:style>
    <style:style style:name="P32" style:family="paragraph" style:parent-style-name="Text_20_body">
      <style:text-properties officeooo:rsid="00ceb949" officeooo:paragraph-rsid="00ceb949"/>
    </style:style>
    <style:style style:name="P33" style:family="paragraph" style:parent-style-name="Text_20_body">
      <style:text-properties officeooo:rsid="0059e122" officeooo:paragraph-rsid="0059e122"/>
    </style:style>
    <style:style style:name="P34" style:family="paragraph" style:parent-style-name="Text_20_body">
      <style:text-properties officeooo:paragraph-rsid="00dae2d7"/>
    </style:style>
    <style:style style:name="P35" style:family="paragraph" style:parent-style-name="Text_20_body">
      <style:text-properties officeooo:rsid="00eea180" officeooo:paragraph-rsid="00eea180"/>
    </style:style>
    <style:style style:name="P36" style:family="paragraph" style:parent-style-name="Contents_20_1">
      <style:paragraph-properties>
        <style:tab-stops>
          <style:tab-stop style:position="5.7693in" style:type="right" style:leader-style="dotted" style:leader-text="."/>
        </style:tab-stops>
      </style:paragraph-properties>
    </style:style>
    <style:style style:name="P37" style:family="paragraph" style:parent-style-name="Figure_20_Index_20_1">
      <style:paragraph-properties>
        <style:tab-stops>
          <style:tab-stop style:position="5.7693in" style:type="right" style:leader-style="dotted" style:leader-text="."/>
        </style:tab-stops>
      </style:paragraph-properties>
    </style:style>
    <style:style style:name="P38" style:family="paragraph" style:parent-style-name="Table_20_index_20_1">
      <style:paragraph-properties>
        <style:tab-stops>
          <style:tab-stop style:position="5.7693in" style:type="right" style:leader-style="dotted" style:leader-text="."/>
        </style:tab-stops>
      </style:paragraph-properties>
    </style:style>
    <style:style style:name="P39" style:family="paragraph" style:parent-style-name="Contents_20_2">
      <style:paragraph-properties>
        <style:tab-stops>
          <style:tab-stop style:position="5.5728in" style:type="right" style:leader-style="dotted" style:leader-text="."/>
        </style:tab-stops>
      </style:paragraph-properties>
    </style:style>
    <style:style style:name="P40" style:family="paragraph" style:parent-style-name="Text_20_body">
      <style:text-properties officeooo:rsid="00f1f68e" officeooo:paragraph-rsid="00f1f68e"/>
    </style:style>
    <style:style style:name="P41" style:family="paragraph" style:parent-style-name="Text_20_body">
      <style:text-properties officeooo:paragraph-rsid="00f2ddc8"/>
    </style:style>
    <style:style style:name="P42" style:family="paragraph" style:parent-style-name="Text_20_body">
      <style:text-properties officeooo:rsid="00f2ddc8" officeooo:paragraph-rsid="00f2ddc8"/>
    </style:style>
    <style:style style:name="P43" style:family="paragraph" style:parent-style-name="Footnote">
      <style:paragraph-properties fo:text-indent="0in" style:auto-text-indent="false"/>
      <style:text-properties officeooo:rsid="01095541" officeooo:paragraph-rsid="01095541"/>
    </style:style>
    <style:style style:name="P44" style:family="paragraph" style:parent-style-name="Text_20_body">
      <style:text-properties officeooo:paragraph-rsid="00fc4639"/>
    </style:style>
    <style:style style:name="P45" style:family="paragraph" style:parent-style-name="Table">
      <style:paragraph-properties fo:keep-with-next="always"/>
    </style:style>
    <style:style style:name="P46" style:family="paragraph" style:parent-style-name="Text_20_body">
      <style:text-properties officeooo:paragraph-rsid="00f9ceb7"/>
    </style:style>
    <style:style style:name="P47" style:family="paragraph" style:parent-style-name="Text_20_body">
      <style:text-properties officeooo:paragraph-rsid="0049279c"/>
    </style:style>
    <style:style style:name="P48" style:family="paragraph" style:parent-style-name="Text_20_body">
      <style:text-properties officeooo:rsid="00d98f86" officeooo:paragraph-rsid="00d98f86"/>
    </style:style>
    <style:style style:name="P49" style:family="paragraph" style:parent-style-name="Text_20_body">
      <style:text-properties officeooo:rsid="010769ee" officeooo:paragraph-rsid="010769ee"/>
    </style:style>
    <style:style style:name="P5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51" style:family="paragraph" style:parent-style-name="Contents_20_Heading" style:master-page-name="Forepages">
      <style:paragraph-properties style:page-number="auto"/>
    </style:style>
    <style:style style:name="P52" style:family="paragraph" style:parent-style-name="Heading_20_1">
      <style:text-properties officeooo:rsid="0074f29c" officeooo:paragraph-rsid="001c9030"/>
    </style:style>
    <style:style style:name="P53" style:family="paragraph" style:parent-style-name="Heading_20_1" style:master-page-name="Standard">
      <style:paragraph-properties style:page-number="auto"/>
      <style:text-properties officeooo:rsid="0074f29c" officeooo:paragraph-rsid="0074f29c"/>
    </style:style>
    <style:style style:name="P54" style:family="paragraph" style:parent-style-name="Heading_20_1">
      <style:paragraph-properties fo:break-before="page"/>
      <style:text-properties officeooo:paragraph-rsid="001c9030"/>
    </style:style>
    <style:style style:name="P55" style:family="paragraph" style:parent-style-name="Heading_20_1" style:list-style-name=""/>
    <style:style style:name="P56" style:family="paragraph" style:parent-style-name="Heading_20_1" style:list-style-name="">
      <style:text-properties officeooo:rsid="00c048a7" officeooo:paragraph-rsid="00c048a7"/>
    </style:style>
    <style:style style:name="P57" style:family="paragraph" style:parent-style-name="Heading_20_1" style:list-style-name="">
      <style:paragraph-properties fo:break-before="page"/>
      <style:text-properties officeooo:rsid="00c048a7" officeooo:paragraph-rsid="00c048a7"/>
    </style:style>
    <style:style style:name="P58" style:family="paragraph" style:parent-style-name="Heading_20_1">
      <style:paragraph-properties fo:break-before="page"/>
    </style:style>
    <style:style style:name="P59" style:family="paragraph" style:parent-style-name="Heading_20_2">
      <style:text-properties officeooo:rsid="00dd6a7f" officeooo:paragraph-rsid="00dd6a7f"/>
    </style:style>
    <style:style style:name="P60" style:family="paragraph" style:parent-style-name="Heading_20_2">
      <style:text-properties officeooo:paragraph-rsid="00dd6a7f"/>
    </style:style>
    <style:style style:name="P61" style:family="paragraph" style:parent-style-name="Heading_20_2">
      <style:paragraph-properties fo:break-before="page"/>
    </style:style>
    <style:style style:name="P62" style:family="paragraph" style:parent-style-name="Heading_20_2">
      <style:text-properties officeooo:paragraph-rsid="00fc4639"/>
    </style:style>
    <style:style style:name="P63" style:family="paragraph" style:parent-style-name="Heading_20_2">
      <style:text-properties officeooo:paragraph-rsid="00bb93c2"/>
    </style:style>
    <style:style style:name="P64" style:family="paragraph" style:parent-style-name="Heading_20_2">
      <style:text-properties officeooo:rsid="00c21267" officeooo:paragraph-rsid="00c21267"/>
    </style:style>
    <style:style style:name="P65" style:family="paragraph" style:parent-style-name="Text_20_body" style:list-style-name="L1">
      <style:text-properties officeooo:rsid="00dd6a7f" officeooo:paragraph-rsid="00dd6a7f"/>
    </style:style>
    <style:style style:name="P66" style:family="paragraph" style:parent-style-name="Text_20_body" style:list-style-name="L2">
      <style:text-properties officeooo:paragraph-rsid="00fc4639"/>
    </style:style>
    <style:style style:name="P67" style:family="paragraph" style:parent-style-name="Text_20_body" style:list-style-name="L3">
      <style:text-properties officeooo:paragraph-rsid="00fc4639"/>
    </style:style>
    <style:style style:name="P68" style:family="paragraph" style:parent-style-name="Text_20_body" style:list-style-name="L4"/>
    <style:style style:name="P69" style:family="paragraph" style:parent-style-name="Text_20_body" style:list-style-name="">
      <style:text-properties officeooo:rsid="00c3bb77" officeooo:paragraph-rsid="00c3bb77"/>
    </style:style>
    <style:style style:name="P70" style:family="paragraph" style:parent-style-name="Text_20_body" style:list-style-name="L5"/>
    <style:style style:name="P71" style:family="paragraph" style:parent-style-name="Text_20_body">
      <style:text-properties officeooo:paragraph-rsid="00fc4639"/>
    </style:style>
    <style:style style:name="P72" style:family="paragraph" style:parent-style-name="Text_20_body">
      <style:text-properties officeooo:rsid="010c9781" officeooo:paragraph-rsid="010c9781"/>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9dee6"/>
    </style:style>
    <style:style style:name="T30" style:family="text">
      <style:text-properties officeooo:rsid="00eacc0e"/>
    </style:style>
    <style:style style:name="T31" style:family="text">
      <style:text-properties officeooo:rsid="00eea180"/>
    </style:style>
    <style:style style:name="T32" style:family="text">
      <style:text-properties officeooo:rsid="00ef46ad"/>
    </style:style>
    <style:style style:name="T33" style:family="text">
      <style:text-properties officeooo:rsid="00f151ff"/>
    </style:style>
    <style:style style:name="T34" style:family="text">
      <style:text-properties officeooo:rsid="00f2ddc8"/>
    </style:style>
    <style:style style:name="T35" style:family="text">
      <style:text-properties officeooo:rsid="00f681bc"/>
    </style:style>
    <style:style style:name="T36" style:family="text">
      <style:text-properties officeooo:rsid="00f83a85"/>
    </style:style>
    <style:style style:name="T37" style:family="text">
      <style:text-properties officeooo:rsid="00f8f37c"/>
    </style:style>
    <style:style style:name="T38" style:family="text">
      <style:text-properties officeooo:rsid="00f9ceb7"/>
    </style:style>
    <style:style style:name="T39" style:family="text">
      <style:text-properties officeooo:rsid="00ffc14b"/>
    </style:style>
    <style:style style:name="T40" style:family="text">
      <style:text-properties officeooo:rsid="0049279c"/>
    </style:style>
    <style:style style:name="T41" style:family="text">
      <style:text-properties officeooo:rsid="01058066"/>
    </style:style>
    <style:style style:name="T42" style:family="text">
      <style:text-properties officeooo:rsid="01095541"/>
    </style:style>
    <style:style style:name="T43" style:family="text">
      <style:text-properties officeooo:rsid="010c978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29">2</text:span><text:span text:style-name="T31">4.0.</text:span><text:span text:style-name="T41">17</text:span></text:p>
      <text:p text:style-name="P6">Ma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1">Table of Contents</text:p>
          </text:index-title>
          <text:p text:style-name="P36"><text:a xlink:type="simple" xlink:href="#__RefHeading___Toc2673_1397740321" text:style-name="Index_20_Link" text:visited-style-name="Index_20_Link">Index of Figures<text:tab/>ii</text:a></text:p>
          <text:p text:style-name="P36"><text:a xlink:type="simple" xlink:href="#__RefHeading___Toc2675_1397740321" text:style-name="Index_20_Link" text:visited-style-name="Index_20_Link">Index of Tables<text:tab/>iii</text:a></text:p>
          <text:p text:style-name="P36"><text:a xlink:type="simple" xlink:href="#__RefHeading___Toc6618_899895566" text:style-name="Index_20_Link" text:visited-style-name="Index_20_Link">Introduction<text:tab/>4</text:a></text:p>
          <text:p text:style-name="P36"><text:a xlink:type="simple" xlink:href="#__RefHeading___Toc193_899895566" text:style-name="Index_20_Link" text:visited-style-name="Index_20_Link">Startup and initial configuration<text:tab/>5</text:a></text:p>
          <text:p text:style-name="P39"><text:a xlink:type="simple" xlink:href="#__RefHeading___Toc195_899895566" text:style-name="Index_20_Link" text:visited-style-name="Index_20_Link">Requirements<text:tab/>5</text:a></text:p>
          <text:p text:style-name="P39"><text:a xlink:type="simple" xlink:href="#__RefHeading___Toc195_899895566%20Copy%201" text:style-name="Index_20_Link" text:visited-style-name="Index_20_Link">Serial communications setup<text:tab/>5</text:a></text:p>
          <text:p text:style-name="P39"><text:a xlink:type="simple" xlink:href="#__RefHeading___Toc2105_1397740321" text:style-name="Index_20_Link" text:visited-style-name="Index_20_Link">The Quicktake 100 or 150 connection to an 8-bits Apple II (IIe, //c, //c+)<text:tab/>5</text:a></text:p>
          <text:p text:style-name="P39"><text:a xlink:type="simple" xlink:href="#__RefHeading___Toc1893_407892232" text:style-name="Index_20_Link" text:visited-style-name="Index_20_Link">Connecting the Quicktake 100 or 150 with the Connector Box<text:tab/>6</text:a></text:p>
          <text:p text:style-name="P39"><text:a xlink:type="simple" xlink:href="#__RefHeading___Toc1895_407892232" text:style-name="Index_20_Link" text:visited-style-name="Index_20_Link">Connecting the Quicktake 100 or 150 with a custom cable<text:tab/>7</text:a></text:p>
          <text:p text:style-name="P39"><text:a xlink:type="simple" xlink:href="#__RefHeading___Toc2107_1397740321" text:style-name="Index_20_Link" text:visited-style-name="Index_20_Link">Super Serial Cards configuration on the Apple IIe<text:tab/>8</text:a></text:p>
          <text:p text:style-name="P39"><text:a xlink:type="simple" xlink:href="#__RefHeading___Toc1897_407892232" text:style-name="Index_20_Link" text:visited-style-name="Index_20_Link">ImageWriter configuration<text:tab/>8</text:a></text:p>
          <text:p text:style-name="P39"><text:a xlink:type="simple" xlink:href="#__RefHeading___Toc1899_407892232" text:style-name="Index_20_Link" text:visited-style-name="Index_20_Link">The Quicktake 100/150 connection to an Apple IIgs<text:tab/>8</text:a></text:p>
          <text:p text:style-name="P39"><text:a xlink:type="simple" xlink:href="#__RefHeading___Toc2109_1397740321" text:style-name="Index_20_Link" text:visited-style-name="Index_20_Link">The Quicktake 200 connection<text:tab/>8</text:a></text:p>
          <text:p text:style-name="P39"><text:a xlink:type="simple" xlink:href="#__RefHeading___Toc2111_1397740321" text:style-name="Index_20_Link" text:visited-style-name="Index_20_Link">Verifying the connection<text:tab/>8</text:a></text:p>
          <text:p text:style-name="P36"><text:a xlink:type="simple" xlink:href="#__RefHeading___Toc2113_1397740321" text:style-name="Index_20_Link" text:visited-style-name="Index_20_Link">The main menu<text:tab/>10</text:a></text:p>
          <text:p text:style-name="P39"><text:a xlink:type="simple" xlink:href="#__RefHeading___Toc2133_1397740321" text:style-name="Index_20_Link" text:visited-style-name="Index_20_Link">Get one picture<text:tab/>10</text:a></text:p>
          <text:p text:style-name="P39"><text:a xlink:type="simple" xlink:href="#__RefHeading___Toc2135_1397740321" text:style-name="Index_20_Link" text:visited-style-name="Index_20_Link">Preview pictures<text:tab/>12</text:a></text:p>
          <text:p text:style-name="P39"><text:a xlink:type="simple" xlink:href="#__RefHeading___Toc2141_1397740321" text:style-name="Index_20_Link" text:visited-style-name="Index_20_Link">Delete all pictures<text:tab/>12</text:a></text:p>
          <text:p text:style-name="P39"><text:a xlink:type="simple" xlink:href="#__RefHeading___Toc2145_1397740321" text:style-name="Index_20_Link" text:visited-style-name="Index_20_Link">Snap a picture<text:tab/>12</text:a></text:p>
          <text:p text:style-name="P39"><text:a xlink:type="simple" xlink:href="#__RefHeading___Toc2149_1397740321" text:style-name="Index_20_Link" text:visited-style-name="Index_20_Link">Set camera name<text:tab/>13</text:a></text:p>
          <text:p text:style-name="P39"><text:a xlink:type="simple" xlink:href="#__RefHeading___Toc2153_1397740321" text:style-name="Index_20_Link" text:visited-style-name="Index_20_Link">Set camera time<text:tab/>13</text:a></text:p>
          <text:p text:style-name="P39"><text:a xlink:type="simple" xlink:href="#__RefHeading___Toc2157_1397740321" text:style-name="Index_20_Link" text:visited-style-name="Index_20_Link">Set quality to...<text:tab/>13</text:a></text:p>
          <text:p text:style-name="P39"><text:a xlink:type="simple" xlink:href="#__RefHeading___Toc2161_1397740321" text:style-name="Index_20_Link" text:visited-style-name="Index_20_Link">Set flash to...<text:tab/>13</text:a></text:p>
          <text:p text:style-name="P36"><text:a xlink:type="simple" xlink:href="#__RefHeading___Toc2165_1397740321" text:style-name="Index_20_Link" text:visited-style-name="Index_20_Link">Editing a picture<text:tab/>14</text:a></text:p>
          <text:p text:style-name="P39"><text:a xlink:type="simple" xlink:href="#__RefHeading___Toc2171_1397740321" text:style-name="Index_20_Link" text:visited-style-name="Index_20_Link">Brightness/contrast settings<text:tab/>14</text:a></text:p>
          <text:p text:style-name="P39"><text:a xlink:type="simple" xlink:href="#__RefHeading___Toc2177_1397740321" text:style-name="Index_20_Link" text:visited-style-name="Index_20_Link">Dithering<text:tab/>15</text:a></text:p>
          <text:p text:style-name="P39"><text:a xlink:type="simple" xlink:href="#__RefHeading___Toc2181_1397740321" text:style-name="Index_20_Link" text:visited-style-name="Index_20_Link">Rotation and reframing<text:tab/>15</text:a></text:p>
          <text:p text:style-name="P39"><text:a xlink:type="simple" xlink:href="#__RefHeading___Toc2189_1397740321" text:style-name="Index_20_Link" text:visited-style-name="Index_20_Link">Saving the result<text:tab/>16</text:a></text:p>
          <text:p text:style-name="P36"><text:a xlink:type="simple" xlink:href="#__RefHeading___Toc2195_1397740321" text:style-name="Index_20_Link" text:visited-style-name="Index_20_Link">Viewing DHGR pictures<text:tab/>17</text:a></text:p>
          <text:p text:style-name="P39"><text:a xlink:type="simple" xlink:href="#__RefHeading___Toc2211_1397740321" text:style-name="Index_20_Link" text:visited-style-name="Index_20_Link">Printing a picture<text:tab/>17</text:a></text:p>
          <text:p text:style-name="P36"><text:a xlink:type="simple" xlink:href="#__RefHeading___Toc2722_899895566" text:style-name="Index_20_Link" text:visited-style-name="Index_20_Link">Links and resources<text:tab/>18</text:a></text:p>
          <text:p text:style-name="P36"><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p text:style-name="P37"><text:a xlink:type="simple" xlink:href="#Figure!7%7Csequence" text:style-name="Index_20_Link" text:visited-style-name="Index_20_Link">Figure 1: Connecting using the Connector Box<text:tab/>6</text:a></text:p>
          <text:p text:style-name="P37"><text:a xlink:type="simple" xlink:href="#Figure!0%7Csequence" text:style-name="Index_20_Link" text:visited-style-name="Index_20_Link">Figure 2: The serial configuration screen<text:tab/>9</text:a></text:p>
          <text:p text:style-name="P37"><text:a xlink:type="simple" xlink:href="#Figure!1%7Csequence" text:style-name="Index_20_Link" text:visited-style-name="Index_20_Link">Figure 3: Quicktake for Apple II's main menu<text:tab/>10</text:a></text:p>
          <text:p text:style-name="P37"><text:a xlink:type="simple" xlink:href="#Figure!2%7Csequence" text:style-name="Index_20_Link" text:visited-style-name="Index_20_Link"><text:soft-page-break/>Figure 4: Selecting the destination directory<text:tab/>11</text:a></text:p>
          <text:p text:style-name="P37"><text:a xlink:type="simple" xlink:href="#Figure!3%7Csequence" text:style-name="Index_20_Link" text:visited-style-name="Index_20_Link">Figure 5: Filling in the image name<text:tab/>11</text:a></text:p>
          <text:p text:style-name="P37"><text:a xlink:type="simple" xlink:href="#Figure!4%7Csequence" text:style-name="Index_20_Link" text:visited-style-name="Index_20_Link">Figure 6: Decompression of a picture<text:tab/>12</text:a></text:p>
          <text:p text:style-name="P37"><text:a xlink:type="simple" xlink:href="#Figure!5%7Csequence" text:style-name="Index_20_Link" text:visited-style-name="Index_20_Link">Figure 7: The picture edition screen<text:tab/>14</text:a></text:p>
          <text:p text:style-name="P37"><text:a xlink:type="simple" xlink:href="#Figure!6%7Csequence" text:style-name="Index_20_Link" text:visited-style-name="Index_20_Link">Figure 8: The reframing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38">Table 1: Serial ports by Apple II type<text:tab/>5</text:p>
          <text:p text:style-name="P38">Table 2: Custom serial cable for Apple //c<text:tab/>7</text:p>
          <text:p text:style-name="P38">Table 3: Custom serial cable for Apple IIe<text:tab/>7</text:p>
          <text:p text:style-name="P38">Table 4: Custom serial cable for Apple //c+<text:tab/>7</text:p>
        </text:index-body>
      </text:table-index>
      <text:h text:style-name="P52" text:outline-level="1" text:is-list-header="true"/>
      <text:h text:style-name="P53"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4">I have not been disappointed and am quite proud of the functionality that this little program provides. About all of the basic <text:span text:style-name="T28">image edition </text:span>things you’d do with a modern computer are doable with an Apple <text:span text:style-name="T30">II</text:span>, if only “a bit” slower. <text:span text:style-name="T27">And if </text:span><text:span text:style-name="T33">1</text:span><text:span text:style-name="T27"> to </text:span><text:span text:style-name="T33">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3">560</text:span>x192 green-and-black images that once were state of the art.</text:p>
      <text:h text:style-name="P54" text:outline-level="1"><text:bookmark-start text:name="__RefHeading___Toc193_899895566"/>Startup and initial configuration<text:bookmark-end text:name="__RefHeading___Toc193_899895566"/></text:h>
      <text:h text:style-name="P59" text:outline-level="2"><text:bookmark-start text:name="__RefHeading___Toc195_899895566"/>Requirements<text:bookmark-end text:name="__RefHeading___Toc195_899895566"/></text:h>
      <text:p text:style-name="P9"/>
      <text:p text:style-name="P18">This software requires an Apple //c, //c+, IIgs; or <text:span text:style-name="T36">a </text:span>IIe with:</text:p>
      <text:list text:style-name="L1">
        <text:list-item>
          <text:p text:style-name="P65">an extended 80-columns card, providing 128kB of RAM total</text:p>
        </text:list-item>
        <text:list-item>
          <text:p text:style-name="P65"><text:span text:style-name="T16">two</text:span> <text:span text:style-name="T33">Super s</text:span>erial cards</text:p>
        </text:list-item>
      </text:list>
      <text:h text:style-name="P60" text:outline-level="2"><text:bookmark-start text:name="__RefHeading___Toc195_899895566 Copy 1"/>Serial communications setup<text:bookmark-end text:name="__RefHeading___Toc195_899895566 Copy 1"/></text:h>
      <text:p text:style-name="P9"/>
      <text:p text:style-name="P17">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6">Apple II type</text:p>
            </table:table-cell>
            <table:table-cell table:style-name="Table1.A1" office:value-type="string">
              <text:p text:style-name="P16">Serial ports</text:p>
            </table:table-cell>
          </table:table-row>
        </table:table-header-rows>
        <table:table-row>
          <table:table-cell table:style-name="Table1.A1" office:value-type="string">
            <text:p text:style-name="P15">Apple //c and //c+</text:p>
          </table:table-cell>
          <table:table-cell table:style-name="Table1.A1" office:value-type="string">
            <text:p text:style-name="P15">Slot 1: Printer port</text:p>
            <text:p text:style-name="P15">Slot 2: Modem port</text:p>
          </table:table-cell>
        </table:table-row>
        <table:table-row>
          <table:table-cell table:style-name="Table1.A1" office:value-type="string">
            <text:p text:style-name="P15">Apple IIe</text:p>
          </table:table-cell>
          <table:table-cell table:style-name="Table1.A1" office:value-type="string">
            <text:p text:style-name="P15">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5">Apple IIgs</text:p>
          </table:table-cell>
          <table:table-cell table:style-name="Table1.A1" office:value-type="string">
            <text:p text:style-name="P15">Channel A: Printer</text:p>
            <text:p text:style-name="P15">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text:span text:style-name="T38">or</text:span> 150 connection <text:span text:style-name="T12">to an </text:span><text:span text:style-name="T38">8-bits</text:span><text:span text:style-name="T12"> Apple II </text:span><text:span text:style-name="T35">(IIe, //c, //</text:span><text:span text:style-name="T38">c+</text:span><text:span text:style-name="T35">)</text:span><text:bookmark-end text:name="__RefHeading___Toc2105_1397740321"/></text:h>
      <text:p text:style-name="Text_20_body">The Quicktake 100 and 150 will not start talking to the computer as long as the DTR line is up. This is not a problem on an Apple IIgs, but will be on all 8-bits Apple II computers, as they use an ACIA-based Super Serial Card: as soon as DTR is deasserted, the ACIA serial chip completely stops communicating. This is a problem that has to be worked around in a hardware fashion. There are two ways to solve this: either using the Apple II Quicktake Connector Box, or building a custom cable.</text:p>
      <text:p text:style-name="Text_20_body">Using the Apple II Quicktake Connector Box has the advantage of letting you keep the printer connected to the computer, instead of having to switch the printer port cable for printing.</text:p>
      <text:p text:style-name="Text_20_body"/>
      <text:h text:style-name="P61" text:outline-level="2"><text:bookmark-start text:name="__RefHeading___Toc1893_407892232"/>Connecting the Quicktake 100 or 150 with the Connector Box<text:bookmark-end text:name="__RefHeading___Toc1893_407892232"/></text:h>
      <text:p text:style-name="Text_20_body">Connect the two DIN-5 cables to the Modem Port and Printer Port connectors on the Connector Box. Connect the other ends of these cables to your computer, using the necessary adapters if needed (for IIe and //c+).</text:p>
      <text:p text:style-name="P46">Connect the Quicktake to the Quicktake port of the Connector Box using a standard AppleTalk cable.</text:p>
      <text:p text:style-name="P46">If you have one, connect your printer to the ImageWriter port of the Connector Box, using a standard AppleTalk cable (plus adapter for the ImageWriter I).</text:p>
      <text:p text:style-name="P46"><draw:frame draw:style-name="fr1" draw:name="Frame8" text:anchor-type="char" svg:width="6.6953in" draw:z-index="14"><draw:text-box fo:min-height="4.0291in"><text:p text:style-name="Figure"><draw:frame draw:style-name="fr2" draw:name="Image8" text:anchor-type="paragraph" svg:width="6.6953in" style:rel-width="100%" svg:height="4.0291in" style:rel-height="scale" draw:z-index="15"><draw:image xlink:href="Pictures/100000010000057200000347E01864FA.png" xlink:type="simple" xlink:show="embed" xlink:actuate="onLoad" draw:mime-type="image/png"/></draw:frame>Figure <text:sequence text:ref-name="refFigure0" text:name="Figure" text:formula="ooow:Figure+1" style:num-format="1">1</text:sequence>: Connecting using the Connector Box</text:p></draw:text-box></draw:frame></text:p>
      <text:h text:style-name="P61" text:outline-level="2"><text:bookmark-start text:name="__RefHeading___Toc1895_407892232"/>Connecting the Quicktake 100 or 150 with a custom cable<text:bookmark-end text:name="__RefHeading___Toc1895_407892232"/></text:h>
      <text:p text:style-name="Text_20_body">Your custom serial cable will plug into the Quicktake on one end, and into two SSCs on the other ends. The cable will be Y shaped. Data will be handled by the modem port, and DTR will be handled by the printer port.</text:p>
      <text:p text:style-name="P45">Table <text:sequence text:ref-name="refTable1" text:name="Table" text:formula="ooow:Table+1" style:num-format="1">2</text:sequence>: Custom serial cable for Apple //c</text:p>
      <table:table table:name="Table4" table:style-name="Table4">
        <table:table-column table:style-name="Table4.A" table:number-columns-repeated="3"/>
        <table:table-column table:style-name="Table4.D"/>
        <table:table-row>
          <table:table-cell table:style-name="Table4.A1" office:value-type="string">
            <text:p text:style-name="P23">Mini-DIN-8 to QT</text:p>
          </table:table-cell>
          <table:table-cell table:style-name="Table4.A1" office:value-type="string">
            <text:p text:style-name="P23">DIN-5 modem port</text:p>
          </table:table-cell>
          <table:table-cell table:style-name="Table4.A1" office:value-type="string">
            <text:p text:style-name="P23">DIN-5 printer port</text:p>
          </table:table-cell>
          <table:table-cell table:style-name="Table4.D1" office:value-type="string">
            <text:p text:style-name="P23"/>
          </table:table-cell>
        </table:table-row>
        <table:table-row>
          <table:table-cell table:style-name="Table4.A2" office:value-type="string">
            <text:p text:style-name="P23"><text:s text:c="6"/><text:span text:style-name="T12">6 7 8</text:span></text:p>
            <text:p text:style-name="P23"><text:s text:c="5"/><text:span text:style-name="T12">3 4 <text:s text:c="2"/>5</text:span></text:p>
            <text:p text:style-name="P23"><text:s text:c="7"/><text:span text:style-name="T12">1 2</text:span></text:p>
          </table:table-cell>
          <table:table-cell table:style-name="Table4.A2" office:value-type="string">
            <text:p text:style-name="P20"><text:s text:c="4"/>1 <text:s text:c="6"/>5</text:p>
            <text:p text:style-name="P20"><text:s text:c="5"/>2 <text:s text:c="4"/>4</text:p>
            <text:p text:style-name="P20"><text:s text:c="8"/>3</text:p>
          </table:table-cell>
          <table:table-cell table:style-name="Table4.A2" office:value-type="string">
            <text:p text:style-name="P19"><text:s text:c="4"/>1 <text:s text:c="6"/>5</text:p>
            <text:p text:style-name="P20"><text:s text:c="5"/>2 <text:s text:c="4"/>4</text:p>
            <text:p text:style-name="P20"><text:s text:c="8"/>3</text:p>
          </table:table-cell>
          <table:table-cell table:style-name="Table4.D2" office:value-type="string">
            <text:p text:style-name="P20">Pin numbering, seen from front of male plug</text:p>
          </table:table-cell>
        </table:table-row>
        <table:table-row>
          <table:table-cell table:style-name="Table4.A2" office:value-type="string">
            <text:p text:style-name="P23">2<text:span text:style-name="T38">+7</text:span></text:p>
          </table:table-cell>
          <table:table-cell table:style-name="Table4.A2" office:value-type="string">
            <text:p text:style-name="P22"/>
          </table:table-cell>
          <table:table-cell table:style-name="Table4.A2" office:value-type="string">
            <text:p text:style-name="P23">1</text:p>
          </table:table-cell>
          <table:table-cell table:style-name="Table4.D2" office:value-type="string">
            <text:p text:style-name="P23">DTR</text:p>
          </table:table-cell>
        </table:table-row>
        <table:table-row>
          <table:table-cell table:style-name="Table4.A2" office:value-type="string">
            <text:p text:style-name="P23">3</text:p>
          </table:table-cell>
          <table:table-cell table:style-name="Table4.A2" office:value-type="string">
            <text:p text:style-name="P23">4</text:p>
          </table:table-cell>
          <table:table-cell table:style-name="Table4.A2" office:value-type="string">
            <text:p text:style-name="P22"/>
          </table:table-cell>
          <table:table-cell table:style-name="Table4.D2" office:value-type="string">
            <text:p text:style-name="P23">RX</text:p>
          </table:table-cell>
        </table:table-row>
        <table:table-row>
          <table:table-cell table:style-name="Table4.A2" office:value-type="string">
            <text:p text:style-name="P23">4</text:p>
          </table:table-cell>
          <table:table-cell table:style-name="Table4.A2" office:value-type="string">
            <text:p text:style-name="P23">3</text:p>
          </table:table-cell>
          <table:table-cell table:style-name="Table4.A2" office:value-type="string">
            <text:p text:style-name="P28"/>
          </table:table-cell>
          <table:table-cell table:style-name="Table4.D2" office:value-type="string">
            <text:p text:style-name="P23">GND</text:p>
          </table:table-cell>
        </table:table-row>
        <table:table-row>
          <table:table-cell table:style-name="Table4.A2" office:value-type="string">
            <text:p text:style-name="P23">5</text:p>
          </table:table-cell>
          <table:table-cell table:style-name="Table4.A2" office:value-type="string">
            <text:p text:style-name="P23">2</text:p>
          </table:table-cell>
          <table:table-cell table:style-name="Table4.A2" office:value-type="string">
            <text:p text:style-name="P22"/>
          </table:table-cell>
          <table:table-cell table:style-name="Table4.D2" office:value-type="string">
            <text:p text:style-name="P23">TX</text:p>
          </table:table-cell>
        </table:table-row>
      </table:table>
      <text:p text:style-name="P45">Table <text:sequence text:ref-name="refTable2" text:name="Table" text:formula="ooow:Table+1" style:num-format="1">3</text:sequence>: Custom serial cable for Apple IIe</text:p>
      <table:table table:name="Table10" table:style-name="Table10">
        <table:table-column table:style-name="Table10.A" table:number-columns-repeated="3"/>
        <table:table-column table:style-name="Table10.D"/>
        <table:table-row>
          <table:table-cell table:style-name="Table10.A1" office:value-type="string">
            <text:p text:style-name="P24">Mini-DIN-8 <text:span text:style-name="T38">to QT</text:span></text:p>
          </table:table-cell>
          <table:table-cell table:style-name="Table10.A1" office:value-type="string">
            <text:p text:style-name="P24"><text:span text:style-name="T12">DB-25 </text:span>modem port</text:p>
          </table:table-cell>
          <table:table-cell table:style-name="Table10.A1" office:value-type="string">
            <text:p text:style-name="P24"><text:span text:style-name="T12">DB-25 </text:span>printer port</text:p>
          </table:table-cell>
          <table:table-cell table:style-name="Table10.D1" office:value-type="string">
            <text:p text:style-name="P24"/>
          </table:table-cell>
        </table:table-row>
        <table:table-row>
          <table:table-cell table:style-name="Table10.A2" office:value-type="string">
            <text:p text:style-name="P24"><text:s text:c="6"/><text:span text:style-name="T12">6 7 8</text:span></text:p>
            <text:p text:style-name="P24"><text:s text:c="5"/><text:span text:style-name="T12">3 4 <text:s text:c="2"/>5</text:span></text:p>
            <text:p text:style-name="P24"><text:s text:c="7"/><text:span text:style-name="T12">1 2</text:span></text:p>
          </table:table-cell>
          <table:table-cell table:style-name="Table10.A2" office:value-type="string">
            <text:p text:style-name="P20">1 2 3 4...11 12 13</text:p>
            <text:p text:style-name="P20"><text:s/>14 15 ... 24 25</text:p>
          </table:table-cell>
          <table:table-cell table:style-name="Table10.A2" office:value-type="string">
            <text:p text:style-name="P20">1 2 3 4...11 12 13</text:p>
            <text:p text:style-name="P20"><text:s/>14 15 ... 24 25</text:p>
          </table:table-cell>
          <table:table-cell table:style-name="Table10.D2" office:value-type="string">
            <text:p text:style-name="P20">Pin numbering, seen from front of male plug</text:p>
          </table:table-cell>
        </table:table-row>
        <table:table-row>
          <table:table-cell table:style-name="Table10.A2" office:value-type="string">
            <text:p text:style-name="P24">2<text:span text:style-name="T38">+7</text:span></text:p>
          </table:table-cell>
          <table:table-cell table:style-name="Table10.A2" office:value-type="string">
            <text:p text:style-name="P27"/>
          </table:table-cell>
          <table:table-cell table:style-name="Table10.A2" office:value-type="string">
            <text:p text:style-name="P20">20</text:p>
          </table:table-cell>
          <table:table-cell table:style-name="Table10.D2" office:value-type="string">
            <text:p text:style-name="P24">DTR</text:p>
          </table:table-cell>
        </table:table-row>
        <table:table-row>
          <table:table-cell table:style-name="Table10.A2" office:value-type="string">
            <text:p text:style-name="P24">3</text:p>
          </table:table-cell>
          <table:table-cell table:style-name="Table10.A2" office:value-type="string">
            <text:p text:style-name="P20">3</text:p>
          </table:table-cell>
          <table:table-cell table:style-name="Table10.A2" office:value-type="string">
            <text:p text:style-name="P27"/>
          </table:table-cell>
          <table:table-cell table:style-name="Table10.D2" office:value-type="string">
            <text:p text:style-name="P24">RX</text:p>
          </table:table-cell>
        </table:table-row>
        <table:table-row>
          <table:table-cell table:style-name="Table10.A2" office:value-type="string">
            <text:p text:style-name="P24">4</text:p>
          </table:table-cell>
          <table:table-cell table:style-name="Table10.A2" office:value-type="string">
            <text:p text:style-name="P20">7</text:p>
          </table:table-cell>
          <table:table-cell table:style-name="Table10.A2" office:value-type="string">
            <text:p text:style-name="P27"/>
          </table:table-cell>
          <table:table-cell table:style-name="Table10.D2" office:value-type="string">
            <text:p text:style-name="P24">GND</text:p>
          </table:table-cell>
        </table:table-row>
        <table:table-row>
          <table:table-cell table:style-name="Table10.A2" office:value-type="string">
            <text:p text:style-name="P24">5</text:p>
          </table:table-cell>
          <table:table-cell table:style-name="Table10.A2" office:value-type="string">
            <text:p text:style-name="P24">2</text:p>
          </table:table-cell>
          <table:table-cell table:style-name="Table10.A2" office:value-type="string">
            <text:p text:style-name="P27"/>
          </table:table-cell>
          <table:table-cell table:style-name="Table10.D2" office:value-type="string">
            <text:p text:style-name="P24">TX</text:p>
          </table:table-cell>
        </table:table-row>
      </table:table>
      <text:p text:style-name="P45">Table <text:sequence text:ref-name="refTable3" text:name="Table" text:formula="ooow:Table+1" style:num-format="1">4</text:sequence>: Custom serial cable for Apple //c+</text:p>
      <table:table table:name="Table2" table:style-name="Table2">
        <table:table-column table:style-name="Table2.A" table:number-columns-repeated="3"/>
        <table:table-column table:style-name="Table2.D"/>
        <table:table-row>
          <table:table-cell table:style-name="Table2.A1" office:value-type="string">
            <text:p text:style-name="P26">Mini-DIN-8 to QT</text:p>
          </table:table-cell>
          <table:table-cell table:style-name="Table2.A1" office:value-type="string">
            <text:p text:style-name="P26"><text:span text:style-name="T12">M-D-8 </text:span>modem port</text:p>
          </table:table-cell>
          <table:table-cell table:style-name="Table2.A1" office:value-type="string">
            <text:p text:style-name="P26"><text:span text:style-name="T12">M-D-8 </text:span>printer port</text:p>
          </table:table-cell>
          <table:table-cell table:style-name="Table2.D1" office:value-type="string">
            <text:p text:style-name="P26"/>
          </table:table-cell>
        </table:table-row>
        <table:table-row>
          <table:table-cell table:style-name="Table2.A2" office:value-type="string">
            <text:p text:style-name="P26"><text:s text:c="6"/><text:span text:style-name="T12">6 7 8</text:span></text:p>
            <text:p text:style-name="P26"><text:s text:c="5"/><text:span text:style-name="T12">3 4 <text:s text:c="2"/>5</text:span></text:p>
            <text:p text:style-name="P26"><text:s text:c="7"/><text:span text:style-name="T12">1 2</text:span></text:p>
          </table:table-cell>
          <table:table-cell table:style-name="Table2.A2" office:value-type="string">
            <text:p text:style-name="P25"><text:s text:c="6"/><text:span text:style-name="T12">6 7 8</text:span></text:p>
            <text:p text:style-name="P26"><text:s text:c="5"/><text:span text:style-name="T12">3 4 <text:s text:c="2"/>5</text:span></text:p>
            <text:p text:style-name="P26"><text:s text:c="7"/><text:span text:style-name="T12">1 2</text:span></text:p>
          </table:table-cell>
          <table:table-cell table:style-name="Table2.A2" office:value-type="string">
            <text:p text:style-name="P25"><text:s text:c="6"/><text:span text:style-name="T12">6 7 8</text:span></text:p>
            <text:p text:style-name="P26"><text:s text:c="5"/><text:span text:style-name="T12">3 4 <text:s text:c="2"/>5</text:span></text:p>
            <text:p text:style-name="P26"><text:s text:c="7"/><text:span text:style-name="T12">1 2</text:span></text:p>
          </table:table-cell>
          <table:table-cell table:style-name="Table2.D2" office:value-type="string">
            <text:p text:style-name="P21">Pin numbering, seen from front of male plug</text:p>
          </table:table-cell>
        </table:table-row>
        <table:table-row>
          <table:table-cell table:style-name="Table2.A2" office:value-type="string">
            <text:p text:style-name="P26">2<text:span text:style-name="T38">+7</text:span></text:p>
          </table:table-cell>
          <table:table-cell table:style-name="Table2.A2" office:value-type="string">
            <text:p text:style-name="P29"/>
          </table:table-cell>
          <table:table-cell table:style-name="Table2.A2" office:value-type="string">
            <text:p text:style-name="P21">20</text:p>
          </table:table-cell>
          <table:table-cell table:style-name="Table2.D2" office:value-type="string">
            <text:p text:style-name="P26">DTR</text:p>
          </table:table-cell>
        </table:table-row>
        <table:table-row>
          <table:table-cell table:style-name="Table2.A2" office:value-type="string">
            <text:p text:style-name="P26">3</text:p>
          </table:table-cell>
          <table:table-cell table:style-name="Table2.A2" office:value-type="string">
            <text:p text:style-name="P30">5</text:p>
          </table:table-cell>
          <table:table-cell table:style-name="Table2.A2" office:value-type="string">
            <text:p text:style-name="P29"/>
          </table:table-cell>
          <table:table-cell table:style-name="Table2.D2" office:value-type="string">
            <text:p text:style-name="P26">RX</text:p>
          </table:table-cell>
        </table:table-row>
        <table:table-row>
          <table:table-cell table:style-name="Table2.A2" office:value-type="string">
            <text:p text:style-name="P26">4</text:p>
          </table:table-cell>
          <table:table-cell table:style-name="Table2.A2" office:value-type="string">
            <text:p text:style-name="P30">4</text:p>
          </table:table-cell>
          <table:table-cell table:style-name="Table2.A2" office:value-type="string">
            <text:p text:style-name="P29"/>
          </table:table-cell>
          <table:table-cell table:style-name="Table2.D2" office:value-type="string">
            <text:p text:style-name="P26">GND</text:p>
          </table:table-cell>
        </table:table-row>
        <table:table-row>
          <table:table-cell table:style-name="Table2.A2" office:value-type="string">
            <text:p text:style-name="P26">5</text:p>
          </table:table-cell>
          <table:table-cell table:style-name="Table2.A2" office:value-type="string">
            <text:p text:style-name="P30">3</text:p>
          </table:table-cell>
          <table:table-cell table:style-name="Table2.A2" office:value-type="string">
            <text:p text:style-name="P29"/>
          </table:table-cell>
          <table:table-cell table:style-name="Table2.D2" office:value-type="string">
            <text:p text:style-name="P26">TX</text:p>
          </table:table-cell>
        </table:table-row>
      </table:table>
      <text:p text:style-name="P46"/>
      <text:h text:style-name="P62" text:outline-level="2"><text:bookmark-start text:name="__RefHeading___Toc2107_1397740321"/><text:soft-page-break/>Super Serial Cards configuration on the Apple IIe<text:bookmark-end text:name="__RefHeading___Toc2107_1397740321"/></text:h>
      <text:p text:style-name="P44">By default, Quicktake for Apple II will use the card in slot 2 as Modem port, and the card in slot 1 as Printer port. Both cards should be configured as follows:</text:p>
      <text:list text:style-name="L2">
        <text:list-item>
          <text:p text:style-name="P66">The jumper block should point towards MODEM</text:p>
        </text:list-item>
        <text:list-item>
          <text:p text:style-name="P66">Modem mode: SW1-5 and SW1-6 should be ON (closed)</text:p>
        </text:list-item>
        <text:list-item>
          <text:p text:style-name="P66">Interrupts: SW2-6 should be ON (closed)</text:p>
        </text:list-item>
        <text:list-item>
          <text:p text:style-name="P66">RS232C signals: SW1-7 should be ON (closed) and SW2-7 OFF (open)</text:p>
        </text:list-item>
      </text:list>
      <text:p text:style-name="P44">See the Super Serial Card user manual<text:note text:id="ftn1" text:note-class="footnote"><text:note-citation>1</text:note-citation><text:note-body><text:p text:style-name="Footnote"><text:a xlink:type="simple" xlink:href="https://mirrors.apple2.org.za/ftp.apple.asimov.net/documentation/hardware/io/%0Asuper_serial_card/Apple%20II%20Super%20Serial%20Card%20User's%20Manual.pdf" text:style-name="Internet_20_link" text:visited-style-name="Visited_20_Internet_20_Link"><text:span text:style-name="T42">https://mirrors.apple2.org.za/ftp.apple.asimov.net/documentation/hardware/io/%0Asuper_serial_card/Apple II Super Serial Card User's Manual.pdf</text:span></text:a></text:p></text:note-body></text:note> for more information.</text:p>
      <text:h text:style-name="Heading_20_2" text:outline-level="2"><text:bookmark-start text:name="__RefHeading___Toc1897_407892232"/>ImageWriter configuration<text:bookmark-end text:name="__RefHeading___Toc1897_407892232"/></text:h>
      <text:p text:style-name="P44">The ImageWriter should be configured for 9600bps, software flow control (XON/XOFF):</text:p>
      <text:list text:style-name="L3">
        <text:list-item>
          <text:p text:style-name="P67">9600 bps: SW2-1 and SW2-2 <text:span text:style-name="T43">ON</text:span> (closed)</text:p>
        </text:list-item>
        <text:list-item>
          <text:p text:style-name="P67">XON/XOFF: SW2-3 O<text:span text:style-name="T43">N</text:span> (closed)</text:p>
        </text:list-item>
      </text:list>
      <text:p text:style-name="P44">These settings are the same for both the ImageWriter I and II.</text:p>
      <text:p text:style-name="P72">On the ImageWriter I, also set SW1-5 OFF (open).</text:p>
      <text:p text:style-name="P49">See their user manuals<text:note text:id="ftn2" text:note-class="footnote"><text:note-citation>2</text:note-citation><text:note-body><text:p text:style-name="Footnote"><text:span text:style-name="T42">ImageWriter I: </text:span><text:a xlink:type="simple" xlink:href="https://documents.cdn.ifixit.com/kc5NFFCZCGGyMYxw.pdf" text:style-name="Internet_20_link" text:visited-style-name="Visited_20_Internet_20_Link">https://documents.cdn.ifixit.com/kc5NFFCZCGGyMYxw.pdf</text:a></text:p><text:p text:style-name="P43">ImageWriter II: <text:a xlink:type="simple" xlink:href="https://apple2online.com/wp-content/uploads/ImageWriter-II-Owners-Manual.pdf" text:style-name="Internet_20_link" text:visited-style-name="Visited_20_Internet_20_Link">https://apple2online.com/wp-content/uploads/ImageWriter-II-Owners-Manual.pdf</text:a></text:p></text:note-body></text:note> for more <text:span text:style-name="T42">information.</text:span></text:p>
      <text:h text:style-name="P62" text:outline-level="2"><text:bookmark-start text:name="__RefHeading___Toc1899_407892232"/>The Quicktake 100/150 connection to an Apple IIgs<text:bookmark-end text:name="__RefHeading___Toc1899_407892232"/></text:h>
      <text:p text:style-name="Text_20_body">A simple, standard AppleTalk cable will do the job.</text:p>
      <text:h text:style-name="P63" text:outline-level="2"><text:bookmark-start text:name="__RefHeading___Toc2109_1397740321"/>The Quicktake 200 connection<text:bookmark-end text:name="__RefHeading___Toc2109_1397740321"/></text:h>
      <text:p text:style-name="Text_20_body"><text:span text:style-name="T39">The Quicktake 200</text:span>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3">but you will have to change the Quicktake cable with the printer cable before, of course.</text:span></text:p>
      <text:p text:style-name="P31"/>
      <text:p text:style-name="P31"/>
      <text:p text:style-name="P31"><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1" text:name="Figure" text:formula="ooow:Figure+1" style:num-format="1">2</text:sequence>: The serial configuration screen</text:p></draw:text-box></draw:frame></text:p>
      <text:p text:style-name="P32">If you want to access image edition and viewing features without connecting your Quicktake, you can wait for the timeout and use the <text:span text:style-name="T16">N</text:span> key to stop trying to connect.</text:p>
      <text:h text:style-name="P56" text:outline-level="1"/>
      <text:h text:style-name="P57"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2" text:name="Figure" text:formula="ooow:Figure+1" style:num-format="1">3</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4">
        <text:list-item>
          <text:p text:style-name="P68"><text:bookmark-start text:name="__RefHeading___Toc2119_1397740321"/>Preview pictures<text:bookmark-end text:name="__RefHeading___Toc2119_1397740321"/></text:p>
        </text:list-item>
        <text:list-item>
          <text:p text:style-name="P68"><text:bookmark-start text:name="__RefHeading___Toc2121_1397740321"/>Delete all pictures<text:bookmark-end text:name="__RefHeading___Toc2121_1397740321"/></text:p>
        </text:list-item>
        <text:list-item>
          <text:p text:style-name="P68"><text:bookmark-start text:name="__RefHeading___Toc2123_1397740321"/>Snap a picture<text:bookmark-end text:name="__RefHeading___Toc2123_1397740321"/></text:p>
        </text:list-item>
        <text:list-item>
          <text:p text:style-name="P68"><text:bookmark-start text:name="__RefHeading___Toc2125_1397740321"/>Set <text:span text:style-name="T19">c</text:span>amera name<text:bookmark-end text:name="__RefHeading___Toc2125_1397740321"/></text:p>
        </text:list-item>
        <text:list-item>
          <text:p text:style-name="P68"><text:bookmark-start text:name="__RefHeading___Toc2127_1397740321"/>Set <text:span text:style-name="T19">c</text:span>amera time<text:bookmark-end text:name="__RefHeading___Toc2127_1397740321"/></text:p>
        </text:list-item>
        <text:list-item>
          <text:p text:style-name="P68"><text:bookmark-start text:name="__RefHeading___Toc2129_1397740321"/>Set quality mode<text:bookmark-end text:name="__RefHeading___Toc2129_1397740321"/></text:p>
        </text:list-item>
        <text:list-item>
          <text:p text:style-name="P68"><text:bookmark-start text:name="__RefHeading___Toc2131_1397740321"/>Set flash mode<text:bookmark-end text:name="__RefHeading___Toc2131_1397740321"/></text:p>
        </text:list-item>
      </text:list>
      <text:h text:style-name="P64"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3" text:name="Figure" text:formula="ooow:Figure+1" style:num-format="1">4</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4" text:name="Figure" text:formula="ooow:Figure+1" style:num-format="1">5</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5" text:name="Figure" text:formula="ooow:Figure+1" style:num-format="1">6</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40">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 <text:span text:style-name="T37">This is useful in a “studio” setting with the camera mounted to a tripod, for example.</text:span><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69" text:outline-level="1"/>
      <text:h text:style-name="P58"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4">it is</text:span> hidden <text:span text:style-name="T34">by default </text:span>(in order to see the bottom of the picture), <text:span text:style-name="T34">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6" text:name="Figure" text:formula="ooow:Figure+1" style:num-format="1">7</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41"><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7" text:name="Figure" text:formula="ooow:Figure+1" style:num-format="1">8</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re 640x480, and you will be able to zoom in</text:span><text:span text:style-name="T24">to</text:span><text:span text:style-name="T20"> regions of either 512x384 pixels, 320x240 pixels or 256x192 pixels.</text:span><text:bookmark-end text:name="__RefHeading___Toc2187_1397740321"/></text:p>
      <text:p text:style-name="P42">The Quicktake 150 and 200 pictures, while being 640x480, are decompressed to 320x240 and you will only be able to zoom into a 256x192 region of them.</text:p>
      <text:p text:style-name="P41">Validating the reframing triggers a new decompression in order to achieve a good quality result.</text:p>
      <text:p text:style-name="P35">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1">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2">D</text:span>HGR picture name will be saved with the same name as the raw picture, with a .<text:span text:style-name="T32">D</text:span>HGR extension.<text:bookmark-end text:name="__RefHeading___Toc2193_1397740321"/></text:p>
      <text:h text:style-name="P55" text:outline-level="1"/>
      <text:h text:style-name="P58" text:outline-level="1"><text:bookmark-start text:name="__RefHeading___Toc2195_1397740321"/>Viewing <text:span text:style-name="T32">D</text:span>HGR pictures<text:bookmark-end text:name="__RefHeading___Toc2195_1397740321"/></text:h>
      <text:p text:style-name="Text_20_body"><text:bookmark-start text:name="__RefHeading___Toc2197_1397740321"/>You can view your <text:span text:style-name="T32">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5">
        <text:list-item>
          <text:p text:style-name="P70"><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70"><text:bookmark-start text:name="__RefHeading___Toc2205_1397740321"/>The <text:span text:style-name="T16">Escape</text:span> key quits the viewer.<text:bookmark-end text:name="__RefHeading___Toc2205_1397740321"/></text:p>
        </text:list-item>
        <text:list-item>
          <text:p text:style-name="P70"><text:bookmark-start text:name="__RefHeading___Toc2207_1397740321"/>The <text:span text:style-name="T16">P</text:span> key allows you to print the picture to an ImageWriter II<text:bookmark-end text:name="__RefHeading___Toc2207_1397740321"/></text:p>
        </text:list-item>
        <text:list-item>
          <text:p text:style-name="P70"><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58"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47"><text:span text:style-name="T40">It is built using cc65, </text:span><text:a xlink:type="simple" xlink:href="https://github.com/cc65/cc65/" text:style-name="Internet_20_link" text:visited-style-name="Visited_20_Internet_20_Link"><text:span text:style-name="T40">https://github.com/cc65/cc65/</text:span></text:a><text:span text:style-name="T40"> </text:span></text:p>
      <text:p text:style-name="P12">The Quicktake Connector Box is available at <text:a xlink:type="simple" xlink:href="https://www.colino.net/shop/" text:style-name="Internet_20_link" text:visited-style-name="Visited_20_Internet_20_Link">https://www.colino.net/shop/</text:a></text:p>
      <text:h text:style-name="P58" text:outline-level="1"><text:bookmark-start text:name="__RefHeading___Toc3798_899895566"/>Thanks and acknowledgments<text:bookmark-end text:name="__RefHeading___Toc3798_899895566"/></text:h>
      <text:p text:style-name="P13"><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3">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48">Thanks to Pierre Dandumont for lending me a Quicktake 150 and 200, so that I could extend my program to also support those.</text:p>
      <text:p text:style-name="P48">Thanks to Jonathan Adar for testing, reporting bugs, suggesting good ideas, and his general enthusiasm.</text:p>
      <text:p text:style-name="P48">Thanks to Philippe Fernandez for gifting me an extra Super Serial Card and an ImageWriter.</text:p>
      <text:p text:style-name="P33">Heartfelt thanks to my soulmate Abigail for <text:span text:style-name="T34">their</text:span> encouragments, <text:span text:style-name="T34">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5-07T15:18:39.242521657</dc:date>
    <meta:editing-duration>P2DT8H5M45S</meta:editing-duration>
    <meta:editing-cycles>227</meta:editing-cycles>
    <meta:generator>LibreOffice/24.2.7.2$Linux_X86_64 LibreOffice_project/420$Build-2</meta:generator>
    <meta:print-date>2023-09-21T10:14:18.194577295</meta:print-date>
    <meta:document-statistic meta:table-count="4" meta:image-count="8" meta:object-count="0" meta:page-count="19" meta:paragraph-count="271" meta:word-count="2771" meta:character-count="15790" meta:non-whitespace-character-count="13144"/>
  </office:meta>
</office:document-meta>
</file>